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FreeSans" svg:font-family="FreeSans" style:font-family-generic="system" style:font-pitch="variable"/>
    <style:font-face style:name="Google Sans Flex" svg:font-family="'Google Sans Flex'"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2.9063in"/>
    </style:style>
    <style:style style:name="co3" style:family="table-column">
      <style:table-column-properties fo:break-before="auto" style:column-width="1.4154in"/>
    </style:style>
    <style:style style:name="ro1" style:family="table-row">
      <style:table-row-properties style:row-height="0.2083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6425in" fo:break-before="auto" style:use-optimal-row-height="true"/>
    </style:style>
    <style:style style:name="ta1" style:family="table" style:master-page-name="PageStyle_5f_Sheet1">
      <style:table-properties table:display="true" style:writing-mode="lr-tb"/>
    </style:style>
    <number:boolean-style style:name="N99">
      <number:boolean/>
    </number:boolean-style>
    <style:style style:name="ce1" style:family="table-cell" style:parent-style-name="Default" style:data-style-name="N99"/>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number-columns-repeated="4" table:default-cell-style-name="Default"/>
        <table:table-column table:style-name="co1" table:default-cell-style-name="ce1"/>
        <table:table-column table:style-name="co1" table:default-cell-style-name="Default"/>
        <table:table-column table:style-name="co1" table:number-columns-repeated="3" table:default-cell-style-name="ce1"/>
        <table:table-column table:style-name="co1" table:number-columns-repeated="3" table:default-cell-style-name="Default"/>
        <table:table-column table:style-name="co3" table:default-cell-style-name="Default"/>
        <table:table-column table:style-name="co1" table:default-cell-style-name="Default"/>
        <table:table-column table:style-name="co1" table:number-columns-repeated="16368"/>
        <table:table-row table:style-name="ro1">
          <table:table-cell office:value-type="string" calcext:value-type="string">
            <text:p>motion_id</text:p>
          </table:table-cell>
          <table:table-cell office:value-type="string" calcext:value-type="string">
            <text:p>motion_topic</text:p>
          </table:table-cell>
          <table:table-cell office:value-type="string" calcext:value-type="string">
            <text:p>policy_id</text:p>
          </table:table-cell>
          <table:table-cell office:value-type="string" calcext:value-type="string">
            <text:p>motion_text_length</text:p>
          </table:table-cell>
          <table:table-cell office:value-type="string" calcext:value-type="string">
            <text:p>speaker</text:p>
          </table:table-cell>
          <table:table-cell office:value-type="string" calcext:value-type="string">
            <text:p>num_tokens</text:p>
          </table:table-cell>
          <table:table-cell table:style-name="Default" office:value-type="string" calcext:value-type="string">
            <text:p>has_entity</text:p>
          </table:table-cell>
          <table:table-cell office:value-type="string" calcext:value-type="string">
            <text:p>motion_text</text:p>
          </table:table-cell>
          <table:table-cell table:style-name="Default" office:value-type="string" calcext:value-type="string">
            <text:p>has_entity_date</text:p>
          </table:table-cell>
          <table:table-cell table:style-name="Default" office:value-type="string" calcext:value-type="string">
            <text:p>has_entity_person</text:p>
          </table:table-cell>
          <table:table-cell table:style-name="Default" office:value-type="string" calcext:value-type="string">
            <text:p>has_entity_event_or_org</text:p>
          </table:table-cell>
          <table:table-cell office:value-type="string" calcext:value-type="string">
            <text:p>aux_numeric_feature</text:p>
          </table:table-cell>
          <table:table-cell office:value-type="string" calcext:value-type="string">
            <text:p>date</text:p>
          </table:table-cell>
          <table:table-cell office:value-type="string" calcext:value-type="string">
            <text:p>date_continuous</text:p>
          </table:table-cell>
          <table:table-cell office:value-type="string" calcext:value-type="string">
            <text:p>motion_priority</text:p>
          </table:table-cell>
          <table:table-cell office:value-type="string" calcext:value-type="string">
            <text:p>party</text:p>
          </table:table-cell>
          <table:table-cell table:style-name="Default" table:number-columns-repeated="16368"/>
        </table:table-row>
        <table:table-row table:style-name="ro2">
          <table:table-cell office:value-type="float" office:value="355" calcext:value-type="float">
            <text:p>355</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1191" calcext:value-type="float">
            <text:p>1191</text:p>
          </table:table-cell>
          <table:table-cell office:value-type="string" calcext:value-type="string">
            <text:p>Ian Cawsey</text:p>
          </table:table-cell>
          <table:table-cell office:value-type="float" office:value="189" calcext:value-type="float">
            <text:p>189</text:p>
          </table:table-cell>
          <table:table-cell table:formula="of:=TRUE()" office:value-type="boolean" office:boolean-value="true" calcext:value-type="boolean">
            <text:p>TRUE</text:p>
          </table:table-cell>
          <table:table-cell office:value-type="string" calcext:value-type="string">
            <text:p>Education and Inspections Bill (Programme)</text:p>
            <text:p>That the following provisions shall apply to the Education and Inspections Bill: Committal 1. The Bill shall be committed to a Standing Committee. Proceedings in Standing Committee 2. Proceedings in the Standing Committee shall (so far as not previously concluded) be brought to a conclusion on Thursday 11th May 2006. 3. The Standing Committee shall have leave to sit twice on the first day on which it meets. Consideration and Third Reading 4. Proceedings on consideration and Third Reading shall be completed in two days. 5. Proceedings on consideration shall (so far as not previously concluded) be brought to a conclusion two hours before the moment of interruption on the second day of proceedings. 6. Proceedings on Third Reading shall (so far as not previously concluded) be brought to a conclusion at the moment of interruption on that day. 7. Standing Order No. 83B (Programming committees) shall not apply to proceedings on consideration and Third Reading. Other proceedings 8. Any other proceedings on the Bill (including any proceedings on consideration of Lords Amendments or on any further messages from the Lords) may be programmed.</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462275288705043" calcext:value-type="float">
            <text:p>-0.462275288705043</text:p>
          </table:table-cell>
          <table:table-cell office:value-type="string" calcext:value-type="string">
            <text:p>2006-03-15</text:p>
          </table:table-cell>
          <table:table-cell office:value-type="float" office:value="0.409090909090909" calcext:value-type="float">
            <text:p>0.409090909090909</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3">
          <table:table-cell office:value-type="float" office:value="399" calcext:value-type="float">
            <text:p>399</text:p>
          </table:table-cell>
          <table:table-cell office:value-type="string" calcext:value-type="string">
            <text:p>Stop climate change</text:p>
          </table:table-cell>
          <table:table-cell office:value-type="float" office:value="1030" calcext:value-type="float">
            <text:p>1030</text:p>
          </table:table-cell>
          <table:table-cell office:value-type="float" office:value="811" calcext:value-type="float">
            <text:p>811</text:p>
          </table:table-cell>
          <table:table-cell office:value-type="string" calcext:value-type="string">
            <text:p>Luciana Berger</text:p>
          </table:table-cell>
          <table:table-cell office:value-type="float" office:value="137" calcext:value-type="float">
            <text:p>137</text:p>
          </table:table-cell>
          <table:table-cell table:formula="of:=TRUE()" office:value-type="boolean" office:boolean-value="true" calcext:value-type="boolean">
            <text:p>TRUE</text:p>
          </table:table-cell>
          <table:table-cell office:value-type="string" calcext:value-type="string">
            <text:p>Energy efficiency aim</text:p>
            <text:p>‘(1) The principal purpose of this Part is to deliver energy savings from the building stock which will make commensurate contributions to— (a) the fulfilment by the Secretary of State of the duties under section 1(1) (reduction of net UK carbon account by 2050) and section 4(1)(b)(carbon budgets) of the Climate Change Act 2008; and (b) the elimination of fuel poverty by the target date required by section 2(2)(d) of the Warm Homes and Energy Conservation Act 2000. (2) In performing functions under this Part the Secretary of State will have regard to— (a) the principal purpose set out in subsection (1) above, and (b) the recommendations from time to time of the Committee on Climate Change where these are adopted by the Secretary of State.’.</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2.45530013991089" calcext:value-type="float">
            <text:p>2.45530013991089</text:p>
          </table:table-cell>
          <table:table-cell office:value-type="string" calcext:value-type="string">
            <text:p>2011-09-14</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51" calcext:value-type="float">
            <text:p>251</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217" calcext:value-type="float">
            <text:p>217</text:p>
          </table:table-cell>
          <table:table-cell/>
          <table:table-cell office:value-type="float" office:value="34" calcext:value-type="float">
            <text:p>34</text:p>
          </table:table-cell>
          <table:table-cell table:formula="of:=TRUE()" office:value-type="boolean" office:boolean-value="true" calcext:value-type="boolean">
            <text:p>TRUE</text:p>
          </table:table-cell>
          <table:table-cell office:value-type="string" calcext:value-type="string">
            <text:p>local government finance bill (carry-over)</text:p>
            <text:p>That if, at the conclusion of this Session of Parliament, proceedings on the Local Government Finance Bill have not been completed, they shall be resumed in the next Session.</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184902136442989" calcext:value-type="float">
            <text:p>-0.184902136442989</text:p>
          </table:table-cell>
          <table:table-cell office:value-type="string" calcext:value-type="string">
            <text:p>2012-01-11</text:p>
          </table:table-cell>
          <table:table-cell office:value-type="float" office:value="0.681818181818182" calcext:value-type="float">
            <text:p>0.681818181818182</text:p>
          </table:table-cell>
          <table:table-cell office:value-type="string" calcext:value-type="string">
            <text:p>Not important</text:p>
          </table:table-cell>
          <table:table-cell/>
          <table:table-cell table:style-name="Default" table:number-columns-repeated="16368"/>
        </table:table-row>
        <table:table-row table:style-name="ro2">
          <table:table-cell office:value-type="float" office:value="342" calcext:value-type="float">
            <text:p>342</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378" calcext:value-type="float">
            <text:p>378</text:p>
          </table:table-cell>
          <table:table-cell office:value-type="string" calcext:value-type="string">
            <text:p>John Martin McDonnell</text:p>
          </table:table-cell>
          <table:table-cell office:value-type="float" office:value="59" calcext:value-type="float">
            <text:p>59</text:p>
          </table:table-cell>
          <table:table-cell table:formula="of:=TRUE()" office:value-type="boolean" office:boolean-value="true" calcext:value-type="boolean">
            <text:p>TRUE</text:p>
          </table:table-cell>
          <table:table-cell office:value-type="string" calcext:value-type="string">
            <text:p>Charter for Budget Responsibility</text:p>
            <text:p>That this House calls on the Government to withdraw the Charter for Budget Responsibility: Autumn 2015 update, which was laid before this House on 12 October 2015, and to lay before the House at the earliest opportunity an alternative update which provides the basis for stabilising the UK economy and providing long-term investment for growth.</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429618219132586" calcext:value-type="float">
            <text:p>0.429618219132586</text:p>
          </table:table-cell>
          <table:table-cell office:value-type="string" calcext:value-type="string">
            <text:p>2016-07-20</text:p>
          </table:table-cell>
          <table:table-cell office:value-type="float" office:value="0.863636363636364" calcext:value-type="float">
            <text:p>0.863636363636364</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63" calcext:value-type="float">
            <text:p>163</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201" calcext:value-type="float">
            <text:p>201</text:p>
          </table:table-cell>
          <table:table-cell office:value-type="string" calcext:value-type="string">
            <text:p>Stewart Hosie</text:p>
          </table:table-cell>
          <table:table-cell office:value-type="float" office:value="35" calcext:value-type="float">
            <text:p>35</text:p>
          </table:table-cell>
          <table:table-cell table:formula="of:=TRUE()" office:value-type="boolean" office:boolean-value="true" calcext:value-type="boolean">
            <text:p>TRUE</text:p>
          </table:table-cell>
          <table:table-cell office:value-type="string" calcext:value-type="string">
            <text:p>Scotland Bill – Taxation: introductory</text:p>
            <text:p>amendment 37, page 16, line 17, at end insert— ‘(f) Chapter 8 provides for an Order in Council to specify, as an additional devolved tax, a duty charged on fuel’.</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055584670910455" calcext:value-type="float">
            <text:p>-0.055584670910455</text:p>
          </table:table-cell>
          <table:table-cell office:value-type="string" calcext:value-type="string">
            <text:p>2011-03-14</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265" calcext:value-type="float">
            <text:p>265</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665" calcext:value-type="float">
            <text:p>665</text:p>
          </table:table-cell>
          <table:table-cell office:value-type="string" calcext:value-type="string">
            <text:p>Mary Creagh</text:p>
          </table:table-cell>
          <table:table-cell office:value-type="float" office:value="105" calcext:value-type="float">
            <text:p>105</text:p>
          </table:table-cell>
          <table:table-cell table:formula="of:=TRUE()" office:value-type="boolean" office:boolean-value="true" calcext:value-type="boolean">
            <text:p>TRUE</text:p>
          </table:table-cell>
          <table:table-cell office:value-type="string" calcext:value-type="string">
            <text:p>Local Bus Services</text:p>
            <text:p>That this House recognises that buses are an important tool to promote economic growth; regrets that, outside London, bus use is in decline; notes that since 2010 1,300 bus routes have been lost; further notes that since 2010 bus fares have risen five times faster than wages; further regrets that deregulation of the bus industry removed the ability of local authorities to co-ordinate their public transport networks; and calls on the Government to ensure that city and county regions are able to make use of London-style powers to develop more integrated, frequent, cheaper and greener bus services with integrated Oyster card-style ticketing.</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399136114352071" calcext:value-type="float">
            <text:p>0.399136114352071</text:p>
          </table:table-cell>
          <table:table-cell office:value-type="string" calcext:value-type="string">
            <text:p>2014-11-05</text:p>
          </table:table-cell>
          <table:table-cell office:value-type="float" office:value="0.772727272727273" calcext:value-type="float">
            <text:p>0.772727272727273</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71" calcext:value-type="float">
            <text:p>371</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78" calcext:value-type="float">
            <text:p>78</text:p>
          </table:table-cell>
          <table:table-cell office:value-type="string" calcext:value-type="string">
            <text:p>Vernon Coaker</text:p>
          </table:table-cell>
          <table:table-cell office:value-type="float" office:value="15" calcext:value-type="float">
            <text:p>15</text:p>
          </table:table-cell>
          <table:table-cell table:formula="of:=TRUE()" office:value-type="boolean" office:boolean-value="true" calcext:value-type="boolean">
            <text:p>TRUE</text:p>
          </table:table-cell>
          <table:table-cell office:value-type="string" calcext:value-type="string">
            <text:p>Effect of Academy order</text:p>
            <text:p>14, page 4, line 21, leave out subsections (3) and (4)</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table-cell office:value-type="string" calcext:value-type="string">
            <text:p>2010-07-21</text:p>
          </table:table-cell>
          <table:table-cell office:value-type="float" office:value="0.590909090909091" calcext:value-type="float">
            <text:p>0.590909090909091</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46" calcext:value-type="float">
            <text:p>346</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102" calcext:value-type="float">
            <text:p>102</text:p>
          </table:table-cell>
          <table:table-cell office:value-type="string" calcext:value-type="string">
            <text:p>Don Foster</text:p>
          </table:table-cell>
          <table:table-cell office:value-type="float" office:value="20" calcext:value-type="float">
            <text:p>20</text:p>
          </table:table-cell>
          <table:table-cell table:formula="of:=TRUE()" office:value-type="boolean" office:boolean-value="true" calcext:value-type="boolean">
            <text:p>TRUE</text:p>
          </table:table-cell>
          <table:table-cell office:value-type="string" calcext:value-type="string">
            <text:p>Code of practice</text:p>
            <text:p>amendment No. 147, in page 67, line 40, leave out from 'ability' to 'any' in line 43.</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office:value-type="float" office:value="-1.08105654040826" calcext:value-type="float">
            <text:p>-1.08105654040826</text:p>
          </table:table-cell>
          <table:table-cell office:value-type="string" calcext:value-type="string">
            <text:p>1988-03-24</text:p>
          </table:table-cell>
          <table:table-cell office:value-type="float" office:value="-0.409090909090909" calcext:value-type="float">
            <text:p>-0.409090909090909</text:p>
          </table:table-cell>
          <table:table-cell office:value-type="string" calcext:value-type="string">
            <text:p>Not important</text:p>
          </table:table-cell>
          <table:table-cell office:value-type="string" calcext:value-type="string">
            <text:p>LD</text:p>
          </table:table-cell>
          <table:table-cell table:style-name="Default" table:number-columns-repeated="16368"/>
        </table:table-row>
        <table:table-row table:style-name="ro3">
          <table:table-cell office:value-type="float" office:value="167" calcext:value-type="float">
            <text:p>167</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446" calcext:value-type="float">
            <text:p>446</text:p>
          </table:table-cell>
          <table:table-cell office:value-type="string" calcext:value-type="string">
            <text:p>Angus MacNeil</text:p>
          </table:table-cell>
          <table:table-cell office:value-type="float" office:value="78" calcext:value-type="float">
            <text:p>78</text:p>
          </table:table-cell>
          <table:table-cell table:formula="of:=TRUE()" office:value-type="boolean" office:boolean-value="true" calcext:value-type="boolean">
            <text:p>TRUE</text:p>
          </table:table-cell>
          <table:table-cell office:value-type="string" calcext:value-type="string">
            <text:p>Financial Services (Regulation of Derivatives) — Crown Estate</text:p>
            <text:p>‘(1) In Part 1 of Schedule 5 to the 1998 Act, paragraphs 2(3) and 3(3)(a) are omitted. (2) The Crown Estate is to be treated as a cross-border public authority for the purposes of sections 88 to 90 of the 1998 Act. (3) In section 1(4) of the Crown Estate Act 1961, for “Secretary of State” wherever it appears, substitute “Scottish Ministers”.’.</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129221181975228" calcext:value-type="float">
            <text:p>0.129221181975228</text:p>
          </table:table-cell>
          <table:table-cell office:value-type="string" calcext:value-type="string">
            <text:p>2011-03-15</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SNP</text:p>
          </table:table-cell>
          <table:table-cell table:style-name="Default" table:number-columns-repeated="16368"/>
        </table:table-row>
        <table:table-row table:style-name="ro3">
          <table:table-cell office:value-type="float" office:value="327" calcext:value-type="float">
            <text:p>327</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238" calcext:value-type="float">
            <text:p>238</text:p>
          </table:table-cell>
          <table:table-cell office:value-type="string" calcext:value-type="string">
            <text:p>Owen Smith</text:p>
          </table:table-cell>
          <table:table-cell office:value-type="float" office:value="38" calcext:value-type="float">
            <text:p>38</text:p>
          </table:table-cell>
          <table:table-cell table:formula="of:=TRUE()" office:value-type="boolean" office:boolean-value="true" calcext:value-type="boolean">
            <text:p>TRUE</text:p>
          </table:table-cell>
          <table:table-cell office:value-type="string" calcext:value-type="string">
            <text:p>Welfare Reform and Work Bill (Programme No. 3) – Repeal of Tax Credits Regulations 2015</text:p>
            <text:p>“(1) The Tax Credits (Income Thresholds and Determination of Rates) (Amendment) Regulations 2015 are repealed.”</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7022471989046" calcext:value-type="float">
            <text:p>-1.57022471989046</text:p>
          </table:table-cell>
          <table:table-cell office:value-type="string" calcext:value-type="string">
            <text:p>2015-10-27</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73" calcext:value-type="float">
            <text:p>473</text:p>
          </table:table-cell>
          <table:table-cell office:value-type="string" calcext:value-type="string">
            <text:p>Terrorism laws - For</text:p>
          </table:table-cell>
          <table:table-cell office:value-type="float" office:value="1053" calcext:value-type="float">
            <text:p>1053</text:p>
          </table:table-cell>
          <table:table-cell office:value-type="float" office:value="247" calcext:value-type="float">
            <text:p>247</text:p>
          </table:table-cell>
          <table:table-cell office:value-type="string" calcext:value-type="string">
            <text:p>Alan Campbell</text:p>
          </table:table-cell>
          <table:table-cell office:value-type="float" office:value="46" calcext:value-type="float">
            <text:p>46</text:p>
          </table:table-cell>
          <table:table-cell table:formula="of:=TRUE()" office:value-type="boolean" office:boolean-value="true" calcext:value-type="boolean">
            <text:p>TRUE</text:p>
          </table:table-cell>
          <table:table-cell office:value-type="string" calcext:value-type="string">
            <text:p>Terrorism Bill – Application of Ss. 1 And 2 to Internet Activity etc.</text:p>
            <text:p>No. 25, in page 6, line 17, leave out "capable of being" and insert "likely to be" Motion made, and Question put, That this House disagrees with the Lords in the said amendment.</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02651529941106" calcext:value-type="float">
            <text:p>-1.02651529941106</text:p>
          </table:table-cell>
          <table:table-cell office:value-type="string" calcext:value-type="string">
            <text:p>2006-02-15</text:p>
          </table:table-cell>
          <table:table-cell office:value-type="float" office:value="0.409090909090909" calcext:value-type="float">
            <text:p>0.409090909090909</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66" calcext:value-type="float">
            <text:p>266</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81" calcext:value-type="float">
            <text:p>181</text:p>
          </table:table-cell>
          <table:table-cell office:value-type="string" calcext:value-type="string">
            <text:p>Amber Rudd</text:p>
          </table:table-cell>
          <table:table-cell office:value-type="float" office:value="29" calcext:value-type="float">
            <text:p>29</text:p>
          </table:table-cell>
          <table:table-cell table:formula="of:=TRUE()" office:value-type="boolean" office:boolean-value="true" calcext:value-type="boolean">
            <text:p>TRUE</text:p>
          </table:table-cell>
          <table:table-cell office:value-type="string" calcext:value-type="string">
            <text:p>Advice on likely impact of onshore petroleum on the carbon budget</text:p>
            <text:p>That this House agrees with Lords amendment 20B to Commons amendment 20 and with consequential Lords amendment 20C.</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office:value-type="float" office:value="-0.0376347024248483" calcext:value-type="float">
            <text:p>-0.0376347024248483</text:p>
          </table:table-cell>
          <table:table-cell office:value-type="string" calcext:value-type="string">
            <text:p>2015-02-11</text:p>
          </table:table-cell>
          <table:table-cell office:value-type="float" office:value="0.818181818181818" calcext:value-type="float">
            <text:p>0.818181818181818</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280" calcext:value-type="float">
            <text:p>280</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532" calcext:value-type="float">
            <text:p>532</text:p>
          </table:table-cell>
          <table:table-cell office:value-type="string" calcext:value-type="string">
            <text:p>Melanie Onn</text:p>
          </table:table-cell>
          <table:table-cell office:value-type="float" office:value="84" calcext:value-type="float">
            <text:p>84</text:p>
          </table:table-cell>
          <table:table-cell table:formula="of:=TRUE()" office:value-type="boolean" office:boolean-value="true" calcext:value-type="boolean">
            <text:p>TRUE</text:p>
          </table:table-cell>
          <table:table-cell office:value-type="string" calcext:value-type="string">
            <text:p>Secure Tenancies (Victims of Domestic Abuse) Bill – Duty to grant old-style secure tenancies: victims of domestic abuse</text:p>
            <text:p>2, page 1, line 25, at end insert— “(2BA) A local housing authority which grants an old-style secure tenancy under subsection (2A) or (2B) has discretion to decide whether or not the maximum rent for the old-style secure tenancy should be determined according to regulation B13 of the Housing Benefit Regulations 2006 (SI 2006/213) as amended by the Housing Benefit (Amendment) Regulations 2012 (SI 2012/ 3040).”</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539759680309362" calcext:value-type="float">
            <text:p>-0.539759680309362</text:p>
          </table:table-cell>
          <table:table-cell office:value-type="string" calcext:value-type="string">
            <text:p>2018-05-08</text:p>
          </table:table-cell>
          <table:table-cell office:value-type="float" office:value="0.954545454545455" calcext:value-type="float">
            <text:p>0.954545454545455</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89" calcext:value-type="float">
            <text:p>289</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1461" calcext:value-type="float">
            <text:p>1461</text:p>
          </table:table-cell>
          <table:table-cell office:value-type="string" calcext:value-type="string">
            <text:p>Stephen Timms</text:p>
          </table:table-cell>
          <table:table-cell office:value-type="float" office:value="257" calcext:value-type="float">
            <text:p>257</text:p>
          </table:table-cell>
          <table:table-cell table:formula="of:=TRUE()" office:value-type="boolean" office:boolean-value="true" calcext:value-type="boolean">
            <text:p>TRUE</text:p>
          </table:table-cell>
          <table:table-cell office:value-type="string" calcext:value-type="string">
            <text:p>Welfare Reform Bill (Programme) (No. 2) – Childcare</text:p>
            <text:p>‘(1) The amount in respect of other particular needs or circumstance, under section 12, shall include a childcare element for claimants who are in work, except in prescribed circumstances. (2) The maximum award of the childcare element shall be a prescribed proportion of childcare costs (not less than 80%, or 90% where the element contributes to care for a disabled child), up to a prescribed maximum value (not less than £175 per week for one child and £300 for two or more children). (3) “Childcare charges” are charges of a prescribed description incurred in respect of childcare by the claimant or claimants by whom a universal credit claim is made. (4) “Childcare”, in relation to a person or persons, means care provided for any child up to the last day in the week in which 1 September falls following the child’s 15th birthday or their 16th birthday if they are disabled, for whom the person is responsible, or for whom either or both of the persons is or are responsible; and by a person of a prescribed description. (5) Except in prescribed circumstances, the childcare element shall not be paid where a claimant is in work for fewer than a prescribed number of hours a week or, in the case of a couple, where one or both of the claimants are in work for fewer than a prescribed number of hours a week. (6) For the purposes of this section, regulations are to provide for a definition of “work.”’.</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982690983945514" calcext:value-type="float">
            <text:p>0.982690983945514</text:p>
          </table:table-cell>
          <table:table-cell office:value-type="string" calcext:value-type="string">
            <text:p>2011-06-13</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00" calcext:value-type="float">
            <text:p>200</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169" calcext:value-type="float">
            <text:p>169</text:p>
          </table:table-cell>
          <table:table-cell office:value-type="string" calcext:value-type="string">
            <text:p>David Lidington</text:p>
          </table:table-cell>
          <table:table-cell office:value-type="float" office:value="24" calcext:value-type="float">
            <text:p>24</text:p>
          </table:table-cell>
          <table:table-cell table:formula="of:=TRUE()" office:value-type="boolean" office:boolean-value="true" calcext:value-type="boolean">
            <text:p>TRUE</text:p>
          </table:table-cell>
          <table:table-cell office:value-type="string" calcext:value-type="string">
            <text:p>European Union (Withdrawal) Bill – Continuation of North-South co-operation and the prevention of new border arrangements</text:p>
            <text:p>That this House agrees with Lords amendments 15</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230934530208678" calcext:value-type="float">
            <text:p>-0.230934530208678</text:p>
          </table:table-cell>
          <table:table-cell office:value-type="string" calcext:value-type="string">
            <text:p>2018-06-12</text:p>
          </table:table-cell>
          <table:table-cell office:value-type="float" office:value="0.954545454545455" calcext:value-type="float">
            <text:p>0.954545454545455</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10" calcext:value-type="float">
            <text:p>410</text:p>
          </table:table-cell>
          <table:table-cell office:value-type="string" calcext:value-type="string">
            <text:p>Stop climate change</text:p>
          </table:table-cell>
          <table:table-cell office:value-type="float" office:value="1030" calcext:value-type="float">
            <text:p>1030</text:p>
          </table:table-cell>
          <table:table-cell office:value-type="float" office:value="104" calcext:value-type="float">
            <text:p>104</text:p>
          </table:table-cell>
          <table:table-cell office:value-type="string" calcext:value-type="string">
            <text:p>Michael Fallon</text:p>
          </table:table-cell>
          <table:table-cell office:value-type="float" office:value="15" calcext:value-type="float">
            <text:p>15</text:p>
          </table:table-cell>
          <table:table-cell table:formula="of:=TRUE()" office:value-type="boolean" office:boolean-value="true" calcext:value-type="boolean">
            <text:p>TRUE</text:p>
          </table:table-cell>
          <table:table-cell office:value-type="string" calcext:value-type="string">
            <text:p>Application and modification of emissions limit duty</text:p>
            <text:p>That this House disagrees with Lords amendment 105.</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office:value-type="float" office:value="-0.552223044280971" calcext:value-type="float">
            <text:p>-0.552223044280971</text:p>
          </table:table-cell>
          <table:table-cell office:value-type="string" calcext:value-type="string">
            <text:p>2013-12-04</text:p>
          </table:table-cell>
          <table:table-cell office:value-type="float" office:value="0.727272727272727" calcext:value-type="float">
            <text:p>0.727272727272727</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3">
          <table:table-cell office:value-type="float" office:value="471" calcext:value-type="float">
            <text:p>471</text:p>
          </table:table-cell>
          <table:table-cell office:value-type="string" calcext:value-type="string">
            <text:p>Terrorism laws - For</text:p>
          </table:table-cell>
          <table:table-cell office:value-type="float" office:value="1053" calcext:value-type="float">
            <text:p>1053</text:p>
          </table:table-cell>
          <table:table-cell office:value-type="float" office:value="378" calcext:value-type="float">
            <text:p>378</text:p>
          </table:table-cell>
          <table:table-cell office:value-type="string" calcext:value-type="string">
            <text:p>Charles Clarke</text:p>
          </table:table-cell>
          <table:table-cell office:value-type="float" office:value="63" calcext:value-type="float">
            <text:p>63</text:p>
          </table:table-cell>
          <table:table-cell table:formula="of:=TRUE()" office:value-type="boolean" office:boolean-value="true" calcext:value-type="boolean">
            <text:p>TRUE</text:p>
          </table:table-cell>
          <table:table-cell office:value-type="string" calcext:value-type="string">
            <text:p>Terrorism Bill – Encouragement of terrorism</text:p>
            <text:p>Lords amendment: No. 5, in page 2, line 1, leave out subsection (4) and insert— "( ) For the purposes of this section, "indirect encouragement" comprises themaking of a statement describing terrorism in such a way that the listener would infer that he should emulate it."</text:p>
            <text:p>That the House disagrees with the Lords in the said amendment.</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194089992898308" calcext:value-type="float">
            <text:p>0.194089992898308</text:p>
          </table:table-cell>
          <table:table-cell office:value-type="string" calcext:value-type="string">
            <text:p>2006-02-15</text:p>
          </table:table-cell>
          <table:table-cell office:value-type="float" office:value="0.409090909090909" calcext:value-type="float">
            <text:p>0.409090909090909</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91" calcext:value-type="float">
            <text:p>191</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145" calcext:value-type="float">
            <text:p>145</text:p>
          </table:table-cell>
          <table:table-cell office:value-type="string" calcext:value-type="string">
            <text:p>Eilidh Whiteford</text:p>
          </table:table-cell>
          <table:table-cell office:value-type="float" office:value="23" calcext:value-type="float">
            <text:p>23</text:p>
          </table:table-cell>
          <table:table-cell table:formula="of:=TRUE()" office:value-type="boolean" office:boolean-value="true" calcext:value-type="boolean">
            <text:p>TRUE</text:p>
          </table:table-cell>
          <table:table-cell office:value-type="string" calcext:value-type="string">
            <text:p>Scotland Bill (Programme) (No.2) – Equal opportunities</text:p>
            <text:p>“In Part 2 of Schedule 5 to the Scotland Act 1998, omit Section L2 (equal opportunities).”</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29507877206362" calcext:value-type="float">
            <text:p>-1.29507877206362</text:p>
          </table:table-cell>
          <table:table-cell office:value-type="string" calcext:value-type="string">
            <text:p>2015-11-09</text:p>
          </table:table-cell>
          <table:table-cell office:value-type="float" office:value="0.818181818181818" calcext:value-type="float">
            <text:p>0.818181818181818</text:p>
          </table:table-cell>
          <table:table-cell office:value-type="string" calcext:value-type="string">
            <text:p>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451" calcext:value-type="float">
            <text:p>451</text:p>
          </table:table-cell>
          <table:table-cell office:value-type="string" calcext:value-type="string">
            <text:p>Terrorism laws - For</text:p>
          </table:table-cell>
          <table:table-cell office:value-type="float" office:value="1053" calcext:value-type="float">
            <text:p>1053</text:p>
          </table:table-cell>
          <table:table-cell office:value-type="float" office:value="123" calcext:value-type="float">
            <text:p>123</text:p>
          </table:table-cell>
          <table:table-cell office:value-type="string" calcext:value-type="string">
            <text:p>Charles Clarke</text:p>
          </table:table-cell>
          <table:table-cell office:value-type="float" office:value="21" calcext:value-type="float">
            <text:p>21</text:p>
          </table:table-cell>
          <table:table-cell table:formula="of:=TRUE()" office:value-type="boolean" office:boolean-value="true" calcext:value-type="boolean">
            <text:p>TRUE</text:p>
          </table:table-cell>
          <table:table-cell office:value-type="string" calcext:value-type="string">
            <text:p>Prevention of Terrorism Bill – Power to make control orders</text:p>
            <text:p>That this House disagrees with the Lords in the said amendment.</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816935670987236" calcext:value-type="float">
            <text:p>-0.816935670987236</text:p>
          </table:table-cell>
          <table:table-cell office:value-type="string" calcext:value-type="string">
            <text:p>2005-03-09</text:p>
          </table:table-cell>
          <table:table-cell office:value-type="float" office:value="0.363636363636364" calcext:value-type="float">
            <text:p>0.363636363636364</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36" calcext:value-type="float">
            <text:p>336</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134" calcext:value-type="float">
            <text:p>134</text:p>
          </table:table-cell>
          <table:table-cell office:value-type="string" calcext:value-type="string">
            <text:p>Priti Patel</text:p>
          </table:table-cell>
          <table:table-cell office:value-type="float" office:value="21" calcext:value-type="float">
            <text:p>21</text:p>
          </table:table-cell>
          <table:table-cell table:formula="of:=TRUE()" office:value-type="boolean" office:boolean-value="true" calcext:value-type="boolean">
            <text:p>TRUE</text:p>
          </table:table-cell>
          <table:table-cell office:value-type="string" calcext:value-type="string">
            <text:p>Welfare Reform and Work Bill – Universal credit: limited capability for work element</text:p>
            <text:p>That this House disagrees with Lords amendment 9.</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55979044793104" calcext:value-type="float">
            <text:p>0.55979044793104</text:p>
          </table:table-cell>
          <table:table-cell office:value-type="string" calcext:value-type="string">
            <text:p>2016-02-23</text:p>
          </table:table-cell>
          <table:table-cell office:value-type="float" office:value="0.863636363636364" calcext:value-type="float">
            <text:p>0.863636363636364</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33" calcext:value-type="float">
            <text:p>433</text:p>
          </table:table-cell>
          <table:table-cell office:value-type="string" calcext:value-type="string">
            <text:p>Terrorism laws - For</text:p>
          </table:table-cell>
          <table:table-cell office:value-type="float" office:value="1053" calcext:value-type="float">
            <text:p>1053</text:p>
          </table:table-cell>
          <table:table-cell office:value-type="float" office:value="112" calcext:value-type="float">
            <text:p>112</text:p>
          </table:table-cell>
          <table:table-cell office:value-type="string" calcext:value-type="string">
            <text:p>David Blunkett</text:p>
          </table:table-cell>
          <table:table-cell office:value-type="float" office:value="19" calcext:value-type="float">
            <text:p>19</text:p>
          </table:table-cell>
          <table:table-cell table:formula="of:=TRUE()" office:value-type="boolean" office:boolean-value="true" calcext:value-type="boolean">
            <text:p>TRUE</text:p>
          </table:table-cell>
          <table:table-cell office:value-type="string" calcext:value-type="string">
            <text:p>Anti-terrorism, Crime and Security Bill — Forfeiture of Terrorist Cash</text:p>
            <text:p>That the Bill be now read the Third tim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01-11-26</text:p>
          </table:table-cell>
          <table:table-cell office:value-type="float" office:value="0.181818181818182" calcext:value-type="float">
            <text:p>0.181818181818182</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33" calcext:value-type="float">
            <text:p>233</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879" calcext:value-type="float">
            <text:p>879</text:p>
          </table:table-cell>
          <table:table-cell office:value-type="string" calcext:value-type="string">
            <text:p>Iain Wright</text:p>
          </table:table-cell>
          <table:table-cell office:value-type="float" office:value="147" calcext:value-type="float">
            <text:p>147</text:p>
          </table:table-cell>
          <table:table-cell table:formula="of:=TRUE()" office:value-type="boolean" office:boolean-value="true" calcext:value-type="boolean">
            <text:p>TRUE</text:p>
          </table:table-cell>
          <table:table-cell office:value-type="string" calcext:value-type="string">
            <text:p>Local Referendums Bill – Social cohesion</text:p>
            <text:p>(1) Before a school makes an application for an Academy order or an Academy arrangement with an additional school the relevant local authority must be asked to assess the impact of Academy status on- (a) admissions in the local authority area where the school is situated; (b) funding between all publicly funded schools in the local authority area where the school is situated; and (c) social cohesion in the local authority area where the school is situated. (2) The impact assessment in subsection (1) should be made with regard to any existing policies the local authority or local schools forum have in relation to (a), (b) and (c). (3) Before making an Academy order or an Academy arrangement with an additional school the Secretary of State must have regard to the impact assessment in subsection (1) made by the local authority.'.</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12905177121723" calcext:value-type="float">
            <text:p>-1.12905177121723</text:p>
          </table:table-cell>
          <table:table-cell office:value-type="string" calcext:value-type="string">
            <text:p>2010-07-26</text:p>
          </table:table-cell>
          <table:table-cell office:value-type="float" office:value="0.590909090909091" calcext:value-type="float">
            <text:p>0.590909090909091</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48" calcext:value-type="float">
            <text:p>248</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68" calcext:value-type="float">
            <text:p>68</text:p>
          </table:table-cell>
          <table:table-cell office:value-type="string" calcext:value-type="string">
            <text:p>Greg Clark</text:p>
          </table:table-cell>
          <table:table-cell office:value-type="float" office:value="13" calcext:value-type="float">
            <text:p>13</text:p>
          </table:table-cell>
          <table:table-cell table:formula="of:=TRUE()" office:value-type="boolean" office:boolean-value="true" calcext:value-type="boolean">
            <text:p>TRUE</text:p>
          </table:table-cell>
          <table:table-cell office:value-type="string" calcext:value-type="string">
            <text:p>Road Safety – Commencement</text:p>
            <text:p>That the Bill be now read the Third tim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326133022242118" calcext:value-type="float">
            <text:p>0.326133022242118</text:p>
          </table:table-cell>
          <table:table-cell office:value-type="string" calcext:value-type="string">
            <text:p>2011-05-18</text:p>
          </table:table-cell>
          <table:table-cell office:value-type="float" office:value="0.636363636363636" calcext:value-type="float">
            <text:p>0.636363636363636</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234" calcext:value-type="float">
            <text:p>234</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90" calcext:value-type="float">
            <text:p>90</text:p>
          </table:table-cell>
          <table:table-cell office:value-type="string" calcext:value-type="string">
            <text:p>Mike Freer</text:p>
          </table:table-cell>
          <table:table-cell office:value-type="float" office:value="17" calcext:value-type="float">
            <text:p>17</text:p>
          </table:table-cell>
          <table:table-cell table:formula="of:=TRUE()" office:value-type="boolean" office:boolean-value="true" calcext:value-type="boolean">
            <text:p>TRUE</text:p>
          </table:table-cell>
          <table:table-cell office:value-type="string" calcext:value-type="string">
            <text:p>London Local Authorities Bill [ Lords] (By Order)</text:p>
            <text:p>That the Bill be now read a Second tim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524520266279774" calcext:value-type="float">
            <text:p>-0.524520266279774</text:p>
          </table:table-cell>
          <table:table-cell office:value-type="string" calcext:value-type="string">
            <text:p>2010-10-13</text:p>
          </table:table-cell>
          <table:table-cell office:value-type="float" office:value="0.590909090909091" calcext:value-type="float">
            <text:p>0.590909090909091</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66" calcext:value-type="float">
            <text:p>466</text:p>
          </table:table-cell>
          <table:table-cell office:value-type="string" calcext:value-type="string">
            <text:p>Terrorism laws - For</text:p>
          </table:table-cell>
          <table:table-cell office:value-type="float" office:value="1053" calcext:value-type="float">
            <text:p>1053</text:p>
          </table:table-cell>
          <table:table-cell office:value-type="float" office:value="736" calcext:value-type="float">
            <text:p>736</text:p>
          </table:table-cell>
          <table:table-cell office:value-type="string" calcext:value-type="string">
            <text:p>Charles Clarke</text:p>
          </table:table-cell>
          <table:table-cell office:value-type="float" office:value="112" calcext:value-type="float">
            <text:p>112</text:p>
          </table:table-cell>
          <table:table-cell table:formula="of:=TRUE()" office:value-type="boolean" office:boolean-value="true" calcext:value-type="boolean">
            <text:p>TRUE</text:p>
          </table:table-cell>
          <table:table-cell office:value-type="string" calcext:value-type="string">
            <text:p>Terrorism Bill (Programme) (No. 2)</text:p>
            <text:p>That the Order of 26th October 2005 (Terrorism Bill (Programme)) be varied as follows: For paragraph 3 (proceedings on consideration) substitute— '3. Proceedings on consideration shall be taken in the order shown in the first column of the following Table and shall be brought to a conclusion (so far as not previously concluded) at the times specified in the second column. Proceedings<text:tab/>Time for conclusion of proceedings Amendments relating to Clause 23, new Clauses<text:tab/>Three hours after the commencement of proceedings on consideration. Amendments relating to Clauses 1 to 22, remaining proceedings on consideration<text:tab/>Three hours after the commencement of proceedings on Amendments relating to Clause 1.'</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0952955323869521" calcext:value-type="float">
            <text:p>-0.0952955323869521</text:p>
          </table:table-cell>
          <table:table-cell office:value-type="string" calcext:value-type="string">
            <text:p>2005-11-09</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25" calcext:value-type="float">
            <text:p>425</text:p>
          </table:table-cell>
          <table:table-cell office:value-type="string" calcext:value-type="string">
            <text:p>Terrorism laws - For</text:p>
          </table:table-cell>
          <table:table-cell office:value-type="float" office:value="1053" calcext:value-type="float">
            <text:p>1053</text:p>
          </table:table-cell>
          <table:table-cell office:value-type="float" office:value="249" calcext:value-type="float">
            <text:p>249</text:p>
          </table:table-cell>
          <table:table-cell office:value-type="string" calcext:value-type="string">
            <text:p>Anne McGuire</text:p>
          </table:table-cell>
          <table:table-cell office:value-type="float" office:value="42" calcext:value-type="float">
            <text:p>42</text:p>
          </table:table-cell>
          <table:table-cell table:formula="of:=TRUE()" office:value-type="boolean" office:boolean-value="true" calcext:value-type="boolean">
            <text:p>TRUE</text:p>
          </table:table-cell>
          <table:table-cell office:value-type="string" calcext:value-type="string">
            <text:p>Anti-terrorism, Crime and Security Bill – Certification: review</text:p>
            <text:p>No. 71, in page 13, line 34, leave out— 'does not agree with the belief or suspicion' and insert— 'considers that there are no reasonable grounds for a belief or suspicion of the kind'.</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730930039941919" calcext:value-type="float">
            <text:p>-0.730930039941919</text:p>
          </table:table-cell>
          <table:table-cell office:value-type="string" calcext:value-type="string">
            <text:p>2001-11-21</text:p>
          </table:table-cell>
          <table:table-cell office:value-type="float" office:value="0.181818181818182" calcext:value-type="float">
            <text:p>0.181818181818182</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63" calcext:value-type="float">
            <text:p>363</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66" calcext:value-type="float">
            <text:p>66</text:p>
          </table:table-cell>
          <table:table-cell office:value-type="string" calcext:value-type="string">
            <text:p>Nick Gibb</text:p>
          </table:table-cell>
          <table:table-cell office:value-type="float" office:value="13" calcext:value-type="float">
            <text:p>13</text:p>
          </table:table-cell>
          <table:table-cell table:formula="of:=TRUE()" office:value-type="boolean" office:boolean-value="true" calcext:value-type="boolean">
            <text:p>TRUE</text:p>
          </table:table-cell>
          <table:table-cell office:value-type="string" calcext:value-type="string">
            <text:p>Code for School Admissions</text:p>
            <text:p>No. 104, in page 26, leave out line 40.</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439731058274175" calcext:value-type="float">
            <text:p>-0.439731058274175</text:p>
          </table:table-cell>
          <table:table-cell office:value-type="string" calcext:value-type="string">
            <text:p>2006-05-24</text:p>
          </table:table-cell>
          <table:table-cell office:value-type="float" office:value="0.409090909090909" calcext:value-type="float">
            <text:p>0.409090909090909</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22" calcext:value-type="float">
            <text:p>422</text:p>
          </table:table-cell>
          <table:table-cell office:value-type="string" calcext:value-type="string">
            <text:p>Terrorism laws - For</text:p>
          </table:table-cell>
          <table:table-cell office:value-type="float" office:value="1053" calcext:value-type="float">
            <text:p>1053</text:p>
          </table:table-cell>
          <table:table-cell office:value-type="float" office:value="787" calcext:value-type="float">
            <text:p>787</text:p>
          </table:table-cell>
          <table:table-cell office:value-type="string" calcext:value-type="string">
            <text:p>Oliver Letwin</text:p>
          </table:table-cell>
          <table:table-cell office:value-type="float" office:value="133" calcext:value-type="float">
            <text:p>133</text:p>
          </table:table-cell>
          <table:table-cell table:formula="of:=TRUE()" office:value-type="boolean" office:boolean-value="true" calcext:value-type="boolean">
            <text:p>TRUE</text:p>
          </table:table-cell>
          <table:table-cell office:value-type="string" calcext:value-type="string">
            <text:p>Anti-terrorism, Crime and Security Bill (Programme) (No. 2)</text:p>
            <text:p>That, in accordance with the resolution of the Programming Committee of 20th November and pursuant to the Programme Order of 19th November (Proceedings in Committee of the whole House, on consideration and on Third Reading of the Anti-terrorism, Crime and Security Bill)— (1) proceedings in Committee of the whole House shall, so far as not previously concluded, be brought to a conclusion at eleven o'clock on the second allotted day; (2) those proceedings shall be taken on each of the allotted days as shown in the second column of the following Table and shall be taken in the order so shown, and shall be brought to a conclusion (so far as not previously concluded) at the times specified in the third column of the Tabl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01-11-21</text:p>
          </table:table-cell>
          <table:table-cell office:value-type="float" office:value="0.181818181818182" calcext:value-type="float">
            <text:p>0.181818181818182</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175" calcext:value-type="float">
            <text:p>175</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435" calcext:value-type="float">
            <text:p>435</text:p>
          </table:table-cell>
          <table:table-cell office:value-type="string" calcext:value-type="string">
            <text:p>Edward Leigh</text:p>
          </table:table-cell>
          <table:table-cell office:value-type="float" office:value="70" calcext:value-type="float">
            <text:p>70</text:p>
          </table:table-cell>
          <table:table-cell table:formula="of:=TRUE()" office:value-type="boolean" office:boolean-value="true" calcext:value-type="boolean">
            <text:p>TRUE</text:p>
          </table:table-cell>
          <table:table-cell office:value-type="string" calcext:value-type="string">
            <text:p>Scotland Bill – Application of the Human Rights Act 1998 to Scotland</text:p>
            <text:p>The consent of the Treasury is required before the enactment of any provision passed by the Scottish Parliament which would affect the liabilities of the National Insurance Fund in respect of old age pensions.” (5) In Part III (general provisions) the following provisions referring to Part II of the Schedule are omitted— (a) paragraph 3(2); (b) paragraph 4(2)(c).”</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34542004615498" calcext:value-type="float">
            <text:p>1.34542004615498</text:p>
          </table:table-cell>
          <table:table-cell office:value-type="string" calcext:value-type="string">
            <text:p>2015-06-15</text:p>
          </table:table-cell>
          <table:table-cell office:value-type="float" office:value="0.818181818181818" calcext:value-type="float">
            <text:p>0.818181818181818</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3">
          <table:table-cell office:value-type="float" office:value="467" calcext:value-type="float">
            <text:p>467</text:p>
          </table:table-cell>
          <table:table-cell office:value-type="string" calcext:value-type="string">
            <text:p>Terrorism laws - For</text:p>
          </table:table-cell>
          <table:table-cell office:value-type="float" office:value="1053" calcext:value-type="float">
            <text:p>1053</text:p>
          </table:table-cell>
          <table:table-cell office:value-type="float" office:value="189" calcext:value-type="float">
            <text:p>189</text:p>
          </table:table-cell>
          <table:table-cell office:value-type="string" calcext:value-type="string">
            <text:p>Charles Clarke</text:p>
          </table:table-cell>
          <table:table-cell office:value-type="float" office:value="33" calcext:value-type="float">
            <text:p>33</text:p>
          </table:table-cell>
          <table:table-cell table:formula="of:=TRUE()" office:value-type="boolean" office:boolean-value="true" calcext:value-type="boolean">
            <text:p>TRUE</text:p>
          </table:table-cell>
          <table:table-cell office:value-type="string" calcext:value-type="string">
            <text:p>Terrorism Bill – Extension of period of detention by judicial Authority</text:p>
            <text:p>No. 55, in clause 23, page 22, line 19, leave out 'three months' and insert 'ninety days'.</text:p>
            <text:p>That the amendment be mad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279021525770339" calcext:value-type="float">
            <text:p>0.279021525770339</text:p>
          </table:table-cell>
          <table:table-cell office:value-type="string" calcext:value-type="string">
            <text:p>2005-11-09</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99" calcext:value-type="float">
            <text:p>299</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98" calcext:value-type="float">
            <text:p>98</text:p>
          </table:table-cell>
          <table:table-cell office:value-type="string" calcext:value-type="string">
            <text:p>Chris Grayling</text:p>
          </table:table-cell>
          <table:table-cell office:value-type="float" office:value="14" calcext:value-type="float">
            <text:p>14</text:p>
          </table:table-cell>
          <table:table-cell table:formula="of:=TRUE()" office:value-type="boolean" office:boolean-value="true" calcext:value-type="boolean">
            <text:p>TRUE</text:p>
          </table:table-cell>
          <table:table-cell office:value-type="string" calcext:value-type="string">
            <text:p>Period of entitlement to contributory allowance</text:p>
            <text:p>That this House disagrees with Lords amendment 18.</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table-cell office:value-type="string" calcext:value-type="string">
            <text:p>2012-02-01</text:p>
          </table:table-cell>
          <table:table-cell office:value-type="float" office:value="0.681818181818182" calcext:value-type="float">
            <text:p>0.681818181818182</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07" calcext:value-type="float">
            <text:p>407</text:p>
          </table:table-cell>
          <table:table-cell office:value-type="string" calcext:value-type="string">
            <text:p>Stop climate change</text:p>
          </table:table-cell>
          <table:table-cell office:value-type="float" office:value="1030" calcext:value-type="float">
            <text:p>1030</text:p>
          </table:table-cell>
          <table:table-cell office:value-type="float" office:value="138" calcext:value-type="float">
            <text:p>138</text:p>
          </table:table-cell>
          <table:table-cell office:value-type="string" calcext:value-type="string">
            <text:p>Tim Yeo</text:p>
          </table:table-cell>
          <table:table-cell office:value-type="float" office:value="22" calcext:value-type="float">
            <text:p>22</text:p>
          </table:table-cell>
          <table:table-cell table:formula="of:=TRUE()" office:value-type="boolean" office:boolean-value="true" calcext:value-type="boolean">
            <text:p>TRUE</text:p>
          </table:table-cell>
          <table:table-cell office:value-type="string" calcext:value-type="string">
            <text:p>Energy Bill – Decarbonisation</text:p>
            <text:p>amendment 11, page 1, line 4, after ‘ensure’, insert— ‘that a decarbonisation target range is set and that’.</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13-06-04</text:p>
          </table:table-cell>
          <table:table-cell office:value-type="float" office:value="0.727272727272727" calcext:value-type="float">
            <text:p>0.727272727272727</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182" calcext:value-type="float">
            <text:p>182</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206" calcext:value-type="float">
            <text:p>206</text:p>
          </table:table-cell>
          <table:table-cell office:value-type="string" calcext:value-type="string">
            <text:p>Eilidh Whiteford</text:p>
          </table:table-cell>
          <table:table-cell office:value-type="float" office:value="35" calcext:value-type="float">
            <text:p>35</text:p>
          </table:table-cell>
          <table:table-cell table:formula="of:=TRUE()" office:value-type="boolean" office:boolean-value="true" calcext:value-type="boolean">
            <text:p>TRUE</text:p>
          </table:table-cell>
          <table:table-cell office:value-type="string" calcext:value-type="string">
            <text:p>Scotland Bill – Universal credit: costs of claimants who rent accommodation</text:p>
            <text:p>amendment 118, page 26, line 20, leave out from “unless” to end of line 25 and insert “they have consulted the Secretary of Stat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69246462971482" calcext:value-type="float">
            <text:p>-1.69246462971482</text:p>
          </table:table-cell>
          <table:table-cell office:value-type="string" calcext:value-type="string">
            <text:p>2015-06-30</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270" calcext:value-type="float">
            <text:p>270</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80" calcext:value-type="float">
            <text:p>80</text:p>
          </table:table-cell>
          <table:table-cell office:value-type="string" calcext:value-type="string">
            <text:p>Chris Stephens</text:p>
          </table:table-cell>
          <table:table-cell office:value-type="float" office:value="14" calcext:value-type="float">
            <text:p>14</text:p>
          </table:table-cell>
          <table:table-cell table:formula="of:=TRUE()" office:value-type="boolean" office:boolean-value="true" calcext:value-type="boolean">
            <text:p>TRUE</text:p>
          </table:table-cell>
          <table:table-cell office:value-type="string" calcext:value-type="string">
            <text:p>Union supervision of picketing</text:p>
            <text:p>amendment 6, page 4, line 31, leave out clause 9.</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office:value-type="float" office:value="-0.363612212213856" calcext:value-type="float">
            <text:p>-0.363612212213856</text:p>
          </table:table-cell>
          <table:table-cell office:value-type="string" calcext:value-type="string">
            <text:p>2015-11-10</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3">
          <table:table-cell office:value-type="float" office:value="165" calcext:value-type="float">
            <text:p>165</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1115" calcext:value-type="float">
            <text:p>1115</text:p>
          </table:table-cell>
          <table:table-cell office:value-type="string" calcext:value-type="string">
            <text:p>Angus MacNeil</text:p>
          </table:table-cell>
          <table:table-cell office:value-type="float" office:value="173" calcext:value-type="float">
            <text:p>173</text:p>
          </table:table-cell>
          <table:table-cell table:formula="of:=TRUE()" office:value-type="boolean" office:boolean-value="true" calcext:value-type="boolean">
            <text:p>TRUE</text:p>
          </table:table-cell>
          <table:table-cell office:value-type="string" calcext:value-type="string">
            <text:p>Financial Services (Regulation of Derivatives) — Maritime policy</text:p>
            <text:p>‘(1) The Scotland Act 1998 is amended as follows. (2) In Schedule 5, section E3, leave out— (a) the Coastguard Act 1925”. (3) After section 90 insert section 90A as follows— “Maritime and Coastguard Agency (Scotland) 90A (1) The Maritime and Coastguard Agency is to be treated as a Cross-Border Public Authority for the purposes of sections 88 to 90. (2) The funding, operation and planning authority of Maritime and Coastguard Agency facilities in Scotland shall reside with the Scottish Government and the appropriate Scottish Minister. (3) These parts of the Maritime and Coastguard Agency which are the responsibility of Scottish Government shall be known as the Maritime and Coastguard Agency (Scotland). (4) The Maritime and Coastguard Agency (Scotland) will be responsible for maintaining and upholding domestic and international laws and obligations in the Scottish Waters. (5) For the purposes of this section, the Scottish Waters are as defined by the Scottish Adjacent Waters Boundary Order 1999.”.’.</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12548904729838" calcext:value-type="float">
            <text:p>-1.12548904729838</text:p>
          </table:table-cell>
          <table:table-cell office:value-type="string" calcext:value-type="string">
            <text:p>2011-03-15</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263" calcext:value-type="float">
            <text:p>263</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495" calcext:value-type="float">
            <text:p>1495</text:p>
          </table:table-cell>
          <table:table-cell office:value-type="string" calcext:value-type="string">
            <text:p>Clive Efford</text:p>
          </table:table-cell>
          <table:table-cell office:value-type="float" office:value="241" calcext:value-type="float">
            <text:p>241</text:p>
          </table:table-cell>
          <table:table-cell table:formula="of:=TRUE()" office:value-type="boolean" office:boolean-value="true" calcext:value-type="boolean">
            <text:p>TRUE</text:p>
          </table:table-cell>
          <table:table-cell office:value-type="string" calcext:value-type="string">
            <text:p>Fixed Odds Betting Terminals</text:p>
            <text:p>That this House is concerned that the clustering of betting shops in or close to deprived communities is being driven by increasing revenue from fixed odds betting terminals (FOBT) rather than traditional over the counter betting; believes that this has encouraged betting shop operators to open more than one premises in close proximity to one another; is aware of the growing concern in many communities about the detrimental effect this is having on the diversity and character of UK high streets; is alarmed that people can stake as much as £100 every 20 seconds on these machines; is further concerned that the practice of single staffing in betting shops leaves staff vulnerable and deters them from intervening if customers suffer heavy losses thereby undermining efforts by the betting industry to protect vulnerable customers; further believes that local authorities should be able to establish a separate planning class for betting shops and that they should be given additional licensing powers to determine the number of FOBT machines within existing and proposed shops and to require that the machines are modified to slow the rate of play and to interrupt when people play for long periods; and calls on the Government to put local people before the interests of the betting shop operators and give local authorities the powers they need to respond to concerns from their local communities and stop the proliferation of FOBT machines and betting shops.</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0967131118703923" calcext:value-type="float">
            <text:p>-0.0967131118703923</text:p>
          </table:table-cell>
          <table:table-cell office:value-type="string" calcext:value-type="string">
            <text:p>2014-01-08</text:p>
          </table:table-cell>
          <table:table-cell office:value-type="float" office:value="0.772727272727273" calcext:value-type="float">
            <text:p>0.772727272727273</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96" calcext:value-type="float">
            <text:p>296</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69" calcext:value-type="float">
            <text:p>69</text:p>
          </table:table-cell>
          <table:table-cell/>
          <table:table-cell office:value-type="float" office:value="12" calcext:value-type="float">
            <text:p>12</text:p>
          </table:table-cell>
          <table:table-cell table:formula="of:=TRUE()" office:value-type="boolean" office:boolean-value="true" calcext:value-type="boolean">
            <text:p>TRUE</text:p>
          </table:table-cell>
          <table:table-cell office:value-type="string" calcext:value-type="string">
            <text:p>Council tax reduction schemes</text:p>
            <text:p>That the clause stand part of the Bill.</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office:value-type="float" office:value="0.517659020469123" calcext:value-type="float">
            <text:p>0.517659020469123</text:p>
          </table:table-cell>
          <table:table-cell office:value-type="string" calcext:value-type="string">
            <text:p>2012-01-31</text:p>
          </table:table-cell>
          <table:table-cell office:value-type="float" office:value="0.681818181818182" calcext:value-type="float">
            <text:p>0.681818181818182</text:p>
          </table:table-cell>
          <table:table-cell office:value-type="string" calcext:value-type="string">
            <text:p>Important</text:p>
          </table:table-cell>
          <table:table-cell/>
          <table:table-cell table:style-name="Default" table:number-columns-repeated="16368"/>
        </table:table-row>
        <table:table-row table:style-name="ro2">
          <table:table-cell office:value-type="float" office:value="272" calcext:value-type="float">
            <text:p>272</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023" calcext:value-type="float">
            <text:p>1023</text:p>
          </table:table-cell>
          <table:table-cell office:value-type="string" calcext:value-type="string">
            <text:p>Nicky Morgan</text:p>
          </table:table-cell>
          <table:table-cell office:value-type="float" office:value="163" calcext:value-type="float">
            <text:p>163</text:p>
          </table:table-cell>
          <table:table-cell table:formula="of:=TRUE()" office:value-type="boolean" office:boolean-value="true" calcext:value-type="boolean">
            <text:p>TRUE</text:p>
          </table:table-cell>
          <table:table-cell office:value-type="string" calcext:value-type="string">
            <text:p>Schools White Paper</text:p>
            <text:p>an amendment, to leave out from “education;” to the end of the Question and add: “welcomes the transformation in England’s schools since 2010 where 1.4 million more children are now taught in good or outstanding schools; notes that the academies programme has been at the heart of that transformation because it trusts school leaders to run schools and empowers them with the freedom to innovate and drive up standards; further notes that there remain too many areas of underperformance and that more needs to be done to ensure that standards in England match those of its best international competitors; and therefore welcomes the Government’s proposals in its White Paper to further improve teacher quality, ensure funding is fairly distributed, tackle areas of chronic educational failure and devolve more power to heads and school leaders to ensure both they and parents have more of a voice in the running of their schools; and welcomes the commitment to achieve educational excellence everywher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307801768892059" calcext:value-type="float">
            <text:p>0.307801768892059</text:p>
          </table:table-cell>
          <table:table-cell office:value-type="string" calcext:value-type="string">
            <text:p>2016-04-13</text:p>
          </table:table-cell>
          <table:table-cell office:value-type="float" office:value="0.863636363636364" calcext:value-type="float">
            <text:p>0.863636363636364</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3">
          <table:table-cell office:value-type="float" office:value="278" calcext:value-type="float">
            <text:p>278</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934" calcext:value-type="float">
            <text:p>934</text:p>
          </table:table-cell>
          <table:table-cell office:value-type="string" calcext:value-type="string">
            <text:p>Roberta Blackman-Woods</text:p>
          </table:table-cell>
          <table:table-cell office:value-type="float" office:value="142" calcext:value-type="float">
            <text:p>142</text:p>
          </table:table-cell>
          <table:table-cell table:formula="of:=TRUE()" office:value-type="boolean" office:boolean-value="true" calcext:value-type="boolean">
            <text:p>TRUE</text:p>
          </table:table-cell>
          <table:table-cell office:value-type="string" calcext:value-type="string">
            <text:p>Neighbourhood Planning Bill – Permitted development: use clauses and demolition of drinking establishments</text:p>
            <text:p>“(1) The Town and Country Planning (Use Classes) Order 1987 (SI/1987/764) is amended as follows. (2) At the end of section 3(6) insert— “(p) drinking establishment.” (3) In the Schedule, leave out the paragraph starting “Class A4. Drinking Establishments” (4) The Town and Country Planning (General Permitted Development) Order 1995 (SI1995/418) is amended as follows. (5) In Part 3 of Schedule 2— (a) in Class A: Permitted development, leave out “A4 (drinking establishments)”. (b) In Class AA: Permitted development, leave out “Class A4 (drinking establishments)”. (c) in Class C: Permitted development, leave out “Class A4 (drinking establishments)”. (6) In Part 31 of Schedule 2 under A.1 at end insert— “() the building subject to demolition is classed as a drinking establishment”.”</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0184339330653931" calcext:value-type="float">
            <text:p>0.0184339330653931</text:p>
          </table:table-cell>
          <table:table-cell office:value-type="string" calcext:value-type="string">
            <text:p>2016-12-13</text:p>
          </table:table-cell>
          <table:table-cell office:value-type="float" office:value="0.863636363636364" calcext:value-type="float">
            <text:p>0.863636363636364</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61" calcext:value-type="float">
            <text:p>261</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61" calcext:value-type="float">
            <text:p>161</text:p>
          </table:table-cell>
          <table:table-cell office:value-type="string" calcext:value-type="string">
            <text:p>Andy Sawford</text:p>
          </table:table-cell>
          <table:table-cell office:value-type="float" office:value="26" calcext:value-type="float">
            <text:p>26</text:p>
          </table:table-cell>
          <table:table-cell table:formula="of:=TRUE()" office:value-type="boolean" office:boolean-value="true" calcext:value-type="boolean">
            <text:p>TRUE</text:p>
          </table:table-cell>
          <table:table-cell office:value-type="string" calcext:value-type="string">
            <text:p>Code of practice on local authority publicity</text:p>
            <text:p>amendment 14, page 26, line 11, leave out ‘one or more specified local authorities’ and insert ‘a local authority’.</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office:value-type="float" office:value="1.69645636829004" calcext:value-type="float">
            <text:p>1.69645636829004</text:p>
          </table:table-cell>
          <table:table-cell office:value-type="string" calcext:value-type="string">
            <text:p>2013-12-17</text:p>
          </table:table-cell>
          <table:table-cell office:value-type="float" office:value="0.727272727272727" calcext:value-type="float">
            <text:p>0.727272727272727</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04" calcext:value-type="float">
            <text:p>304</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912" calcext:value-type="float">
            <text:p>912</text:p>
          </table:table-cell>
          <table:table-cell office:value-type="string" calcext:value-type="string">
            <text:p>Liam Byrne</text:p>
          </table:table-cell>
          <table:table-cell office:value-type="float" office:value="156" calcext:value-type="float">
            <text:p>156</text:p>
          </table:table-cell>
          <table:table-cell table:formula="of:=TRUE()" office:value-type="boolean" office:boolean-value="true" calcext:value-type="boolean">
            <text:p>TRUE</text:p>
          </table:table-cell>
          <table:table-cell office:value-type="string" calcext:value-type="string">
            <text:p>Universal Credit and Welfare Reform</text:p>
            <text:p>That this House notes that the Universal Credit is late and over budget; recognises that there is widespread unease surrounding the implementation of the £2 billion scheme’s IT system; further notes that the project is so badly designed that it is set to reduce work incentives for over two million people and hurt small businesses and the self-employed; believes that Ministers have failed to properly account for numerous basic details of how the scheme will work, such as its interaction with free school meals or what is to be done with 20,000 Housing Benefit staff; further believes that the project is poorly thought through and is now at risk of descending into chaos; and calls on the Government to publish the business case, so that the House can see a detailed plan of implementation, and urgently to set out a plan to address these deep flaws before it is too lat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975873252977333" calcext:value-type="float">
            <text:p>-0.975873252977333</text:p>
          </table:table-cell>
          <table:table-cell office:value-type="string" calcext:value-type="string">
            <text:p>2012-09-11</text:p>
          </table:table-cell>
          <table:table-cell office:value-type="float" office:value="0.681818181818182" calcext:value-type="float">
            <text:p>0.681818181818182</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14" calcext:value-type="float">
            <text:p>314</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807" calcext:value-type="float">
            <text:p>807</text:p>
          </table:table-cell>
          <table:table-cell office:value-type="string" calcext:value-type="string">
            <text:p>Rachel Reeves</text:p>
          </table:table-cell>
          <table:table-cell office:value-type="float" office:value="130" calcext:value-type="float">
            <text:p>130</text:p>
          </table:table-cell>
          <table:table-cell table:formula="of:=TRUE()" office:value-type="boolean" office:boolean-value="true" calcext:value-type="boolean">
            <text:p>TRUE</text:p>
          </table:table-cell>
          <table:table-cell office:value-type="string" calcext:value-type="string">
            <text:p>Housing Benefit</text:p>
            <text:p>That this House regrets the pernicious effect on vulnerable and in many cases disabled people of deductions being made from housing benefit paid to working age tenants in the social housing sector deemed to have an excess number of bedrooms in their homes; calls on the Government to end these deductions with immediate effect; furthermore calls for any cost of ending them to be covered by reversing tax cuts which will benefit the wealthiest and promote avoidance, and addressing the tax loss from disguised employment in construction; and further calls on the Government to use the funding set aside for discretionary housing payments to deal with under-occupation by funding local authorities so that they are better able to help people with the cost of moving to suitable accommodation.</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2.5600845382688" calcext:value-type="float">
            <text:p>2.5600845382688</text:p>
          </table:table-cell>
          <table:table-cell office:value-type="string" calcext:value-type="string">
            <text:p>2013-11-12</text:p>
          </table:table-cell>
          <table:table-cell office:value-type="float" office:value="0.727272727272727" calcext:value-type="float">
            <text:p>0.727272727272727</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21" calcext:value-type="float">
            <text:p>421</text:p>
          </table:table-cell>
          <table:table-cell office:value-type="string" calcext:value-type="string">
            <text:p>Terrorism laws - For</text:p>
          </table:table-cell>
          <table:table-cell office:value-type="float" office:value="1053" calcext:value-type="float">
            <text:p>1053</text:p>
          </table:table-cell>
          <table:table-cell office:value-type="float" office:value="211" calcext:value-type="float">
            <text:p>211</text:p>
          </table:table-cell>
          <table:table-cell office:value-type="string" calcext:value-type="string">
            <text:p>Ian Pearson</text:p>
          </table:table-cell>
          <table:table-cell office:value-type="float" office:value="30" calcext:value-type="float">
            <text:p>30</text:p>
          </table:table-cell>
          <table:table-cell table:formula="of:=TRUE()" office:value-type="boolean" office:boolean-value="true" calcext:value-type="boolean">
            <text:p>TRUE</text:p>
          </table:table-cell>
          <table:table-cell office:value-type="string" calcext:value-type="string">
            <text:p>Anti-Terrorism, Crime and Security Bill (Programme) – Programming Committee</text:p>
            <text:p>4. Sessional Order B (Programming Committees) made on 28th June 2001 shall not apply to proceedings on consideration and Third Reading.</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2.01020453876635" calcext:value-type="float">
            <text:p>2.01020453876635</text:p>
          </table:table-cell>
          <table:table-cell office:value-type="string" calcext:value-type="string">
            <text:p>2001-11-19</text:p>
          </table:table-cell>
          <table:table-cell office:value-type="float" office:value="0.181818181818182" calcext:value-type="float">
            <text:p>0.181818181818182</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3">
          <table:table-cell office:value-type="float" office:value="247" calcext:value-type="float">
            <text:p>247</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284" calcext:value-type="float">
            <text:p>284</text:p>
          </table:table-cell>
          <table:table-cell office:value-type="string" calcext:value-type="string">
            <text:p>Heidi Alexander</text:p>
          </table:table-cell>
          <table:table-cell office:value-type="float" office:value="45" calcext:value-type="float">
            <text:p>45</text:p>
          </table:table-cell>
          <table:table-cell table:formula="of:=TRUE()" office:value-type="boolean" office:boolean-value="true" calcext:value-type="boolean">
            <text:p>TRUE</text:p>
          </table:table-cell>
          <table:table-cell office:value-type="string" calcext:value-type="string">
            <text:p>Road Safety – Designation of Mayoral development areas</text:p>
            <text:p>Amendment proposed: 352, page 148, line 7, at end insert— ‘(e) a majority of those London borough councils whose borough contains any part of the designated development area agree to the designation.’.</text:p>
            <text:p>That the amendment be mad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30954643931399" calcext:value-type="float">
            <text:p>-0.30954643931399</text:p>
          </table:table-cell>
          <table:table-cell office:value-type="string" calcext:value-type="string">
            <text:p>2011-05-18</text:p>
          </table:table-cell>
          <table:table-cell office:value-type="float" office:value="0.636363636363636" calcext:value-type="float">
            <text:p>0.636363636363636</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83" calcext:value-type="float">
            <text:p>383</text:p>
          </table:table-cell>
          <table:table-cell office:value-type="string" calcext:value-type="string">
            <text:p>Stop climate change</text:p>
          </table:table-cell>
          <table:table-cell office:value-type="float" office:value="1030" calcext:value-type="float">
            <text:p>1030</text:p>
          </table:table-cell>
          <table:table-cell office:value-type="float" office:value="97" calcext:value-type="float">
            <text:p>97</text:p>
          </table:table-cell>
          <table:table-cell office:value-type="string" calcext:value-type="string">
            <text:p>Keith Hill</text:p>
          </table:table-cell>
          <table:table-cell office:value-type="float" office:value="15" calcext:value-type="float">
            <text:p>15</text:p>
          </table:table-cell>
          <table:table-cell table:formula="of:=TRUE()" office:value-type="boolean" office:boolean-value="true" calcext:value-type="boolean">
            <text:p>TRUE</text:p>
          </table:table-cell>
          <table:table-cell office:value-type="string" calcext:value-type="string">
            <text:p>Improvements in Energy Efficiency</text:p>
            <text:p>That this House disagrees with the Lords in the said amendment.</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918651946484198" calcext:value-type="float">
            <text:p>-0.918651946484198</text:p>
          </table:table-cell>
          <table:table-cell office:value-type="string" calcext:value-type="string">
            <text:p>2004-11-08</text:p>
          </table:table-cell>
          <table:table-cell office:value-type="float" office:value="0.318181818181818" calcext:value-type="float">
            <text:p>0.318181818181818</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96" calcext:value-type="float">
            <text:p>396</text:p>
          </table:table-cell>
          <table:table-cell office:value-type="string" calcext:value-type="string">
            <text:p>Stop climate change</text:p>
          </table:table-cell>
          <table:table-cell office:value-type="float" office:value="1030" calcext:value-type="float">
            <text:p>1030</text:p>
          </table:table-cell>
          <table:table-cell office:value-type="float" office:value="865" calcext:value-type="float">
            <text:p>865</text:p>
          </table:table-cell>
          <table:table-cell office:value-type="string" calcext:value-type="string">
            <text:p>Joan Ruddock</text:p>
          </table:table-cell>
          <table:table-cell office:value-type="float" office:value="152" calcext:value-type="float">
            <text:p>152</text:p>
          </table:table-cell>
          <table:table-cell table:formula="of:=TRUE()" office:value-type="boolean" office:boolean-value="true" calcext:value-type="boolean">
            <text:p>TRUE</text:p>
          </table:table-cell>
          <table:table-cell office:value-type="string" calcext:value-type="string">
            <text:p>Report on the civil estate</text:p>
            <text:p>(1) It is the duty of the Office of Government Commerce to lay before Parliament each year a report setting out the progress Her Majesty's Government has made towards improving the efficiency and sustainability of its civil estate. (2) The report must include the progress made towards— (a) reducing the size of the civil estate; (b) improving the sustainability of the buildings that already form part of the civil estate; and (c) ensuring that any new buildings procured for the civil estate are in the upper quartile of energy performance. (3) Where any new building procured for the civil estate is not in the upper quartile of energy performance, the report must state the reasons why this is the case. (4) A report under this section must be laid before Parliament not later than 1st June in the year in which it is to be so laid.'.</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166452208213056" calcext:value-type="float">
            <text:p>0.166452208213056</text:p>
          </table:table-cell>
          <table:table-cell office:value-type="string" calcext:value-type="string">
            <text:p>2008-10-28</text:p>
          </table:table-cell>
          <table:table-cell office:value-type="float" office:value="0.5" calcext:value-type="float">
            <text:p>0.5</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85" calcext:value-type="float">
            <text:p>285</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1228" calcext:value-type="float">
            <text:p>1228</text:p>
          </table:table-cell>
          <table:table-cell office:value-type="string" calcext:value-type="string">
            <text:p>Andy Burnham</text:p>
          </table:table-cell>
          <table:table-cell office:value-type="float" office:value="187" calcext:value-type="float">
            <text:p>187</text:p>
          </table:table-cell>
          <table:table-cell table:formula="of:=TRUE()" office:value-type="boolean" office:boolean-value="true" calcext:value-type="boolean">
            <text:p>TRUE</text:p>
          </table:table-cell>
          <table:table-cell office:value-type="string" calcext:value-type="string">
            <text:p>Education Maintenance Allowance</text:p>
            <text:p>That this House believes that disadvantaged young people should gain greater access to further and higher education; recognises the valuable role that the education maintenance allowance (EMA) has played in supporting young people from less well-off backgrounds to participate and succeed in education; further recognises how EMA has supported choice for students in post-16 education, allowing them to travel to the best institution for their studies, which is of particular importance in rural areas; further notes that EMA is used by the majority of recipients to fund travel to college, as well as books and equipment, and allows recipients to focus on their studies rather than taking a part-time job; notes that EMA has been retained in Scotland, Wales and Northern Ireland; further notes research from the Institute for Fiscal Studies stating that EMA costs are completely offset by its benefits in raising participation; further notes the inquiry into educational access announced by the Education Select Committee; and calls on the Government to rethink its decision on EMA, retaining practical support to improve access to, interest in and participation in further and higher education.</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11-01-19</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73" calcext:value-type="float">
            <text:p>373</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667" calcext:value-type="float">
            <text:p>667</text:p>
          </table:table-cell>
          <table:table-cell office:value-type="string" calcext:value-type="string">
            <text:p>Iain Wright</text:p>
          </table:table-cell>
          <table:table-cell office:value-type="float" office:value="102" calcext:value-type="float">
            <text:p>102</text:p>
          </table:table-cell>
          <table:table-cell table:formula="of:=TRUE()" office:value-type="boolean" office:boolean-value="true" calcext:value-type="boolean">
            <text:p>TRUE</text:p>
          </table:table-cell>
          <table:table-cell office:value-type="string" calcext:value-type="string">
            <text:p>Requirement to achieve specified standard: suppliers of careers guidance</text:p>
            <text:p>‘(1) EA 2002 is amended as follows. (2) In section 29 (additional functions of governing body), after subsection (5) insert— “(6) The governing body and head teacher of a maintained school shall comply with any standards prescribed by the Secretary of State in securing that all relevant registered pupils at the school are provided with independent careers guidance under section 42A (Provision of careers guidance in schools in England) of the Education Act 1997 including the opportunity for pupils to meet at the premises of the school the person providing independent careers guidanc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40934744018558" calcext:value-type="float">
            <text:p>1.40934744018558</text:p>
          </table:table-cell>
          <table:table-cell office:value-type="string" calcext:value-type="string">
            <text:p>2011-05-11</text:p>
          </table:table-cell>
          <table:table-cell office:value-type="float" office:value="0.636363636363636" calcext:value-type="float">
            <text:p>0.636363636363636</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3">
          <table:table-cell office:value-type="float" office:value="364" calcext:value-type="float">
            <text:p>364</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1449" calcext:value-type="float">
            <text:p>1449</text:p>
          </table:table-cell>
          <table:table-cell office:value-type="string" calcext:value-type="string">
            <text:p>Alan Johnson</text:p>
          </table:table-cell>
          <table:table-cell office:value-type="float" office:value="250" calcext:value-type="float">
            <text:p>250</text:p>
          </table:table-cell>
          <table:table-cell table:formula="of:=TRUE()" office:value-type="boolean" office:boolean-value="true" calcext:value-type="boolean">
            <text:p>TRUE</text:p>
          </table:table-cell>
          <table:table-cell office:value-type="string" calcext:value-type="string">
            <text:p>Repeals</text:p>
            <text:p>Amendments made: No. 78, in page 239, line 9, at end insert— 'Education Act 1996 (c. 56)        In section 444 In subsection (1A), the words "without reasonable justification", an In subsection (3),paragraph (b) andthe word "or" immediately following it.' No. 79, in page 239, line 27, column 2, at beginning insert— 'Section 159(3). No. 80, in page 241, line 33, column 2, leave out 'In section 15(7), the words "65 or" ' and insert 'Section 15(7)'. No. 81, in page 241, line 39, column 2, at beginning insert— 'In Schedule 7, paragraph 13.' No. 82, in page 241, line 39, column 2, leave out 'paragraph 79' and insert 'paragraphs 78 and 79'. No. 83, in page 241, line 47, column 2, at end insert— 'In Schedule 5, paragraph 3(14).' No. 118, in page 243, line 4, column 2, leave out 'paragraph 13A(4)' and insert 'paragraphs 13A(4) and 14(1)'. No. 38, in page 244, line 37, column 2, at end insert— 'In Schedule 22—paragraph 1(1)(c);in paragraph 2(1)(a), the words from "or acquired" to the end; in paragraph 3(1)(a), the words from "or acquired" to the end; paragraph 3(1)(d);in paragraph 3(1)(f), the words "(d) or"; and in paragraph 3(8), the words "(d),".' No. 39, in page 244, line 37, at end insert— 'Education Act 2002 (c.32)        In Schedule 21, paragraph 118(3)(b) and (4)(a)(ii).' No. 40, in page 244, line 39, at end add— 'Education Act 2005 (c.18)        In Schedule 12, paragraph 15.'.</text:p>
            <text:p>That the Bill be now read the Thir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44697788435373" calcext:value-type="float">
            <text:p>1.44697788435373</text:p>
          </table:table-cell>
          <table:table-cell office:value-type="string" calcext:value-type="string">
            <text:p>2006-05-24</text:p>
          </table:table-cell>
          <table:table-cell office:value-type="float" office:value="0.409090909090909" calcext:value-type="float">
            <text:p>0.409090909090909</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12" calcext:value-type="float">
            <text:p>312</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121" calcext:value-type="float">
            <text:p>121</text:p>
          </table:table-cell>
          <table:table-cell office:value-type="string" calcext:value-type="string">
            <text:p>Iain Duncan Smith</text:p>
          </table:table-cell>
          <table:table-cell office:value-type="float" office:value="21" calcext:value-type="float">
            <text:p>21</text:p>
          </table:table-cell>
          <table:table-cell table:formula="of:=TRUE()" office:value-type="boolean" office:boolean-value="true" calcext:value-type="boolean">
            <text:p>TRUE</text:p>
          </table:table-cell>
          <table:table-cell office:value-type="string" calcext:value-type="string">
            <text:p>Up-rating of certain social security benefits for tax years 2014-15 and 2015-16</text:p>
            <text:p>That the Bill be now read the Third tim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table-cell office:value-type="string" calcext:value-type="string">
            <text:p>2013-01-21</text:p>
          </table:table-cell>
          <table:table-cell office:value-type="float" office:value="0.727272727272727" calcext:value-type="float">
            <text:p>0.727272727272727</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281" calcext:value-type="float">
            <text:p>281</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80" calcext:value-type="float">
            <text:p>180</text:p>
          </table:table-cell>
          <table:table-cell/>
          <table:table-cell office:value-type="float" office:value="27" calcext:value-type="float">
            <text:p>27</text:p>
          </table:table-cell>
          <table:table-cell table:formula="of:=TRUE()" office:value-type="boolean" office:boolean-value="true" calcext:value-type="boolean">
            <text:p>TRUE</text:p>
          </table:table-cell>
          <table:table-cell office:value-type="string" calcext:value-type="string">
            <text:p>Local Government</text:p>
            <text:p>That the draft Somerset West and Taunton (Modification of Boundary Change Enactments) Regulations 2018, which were laid before this House on 29 March, be approved.</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778304725402313" calcext:value-type="float">
            <text:p>-0.778304725402313</text:p>
          </table:table-cell>
          <table:table-cell office:value-type="string" calcext:value-type="string">
            <text:p>2018-05-23</text:p>
          </table:table-cell>
          <table:table-cell office:value-type="float" office:value="0.954545454545455" calcext:value-type="float">
            <text:p>0.954545454545455</text:p>
          </table:table-cell>
          <table:table-cell office:value-type="string" calcext:value-type="string">
            <text:p>Not important</text:p>
          </table:table-cell>
          <table:table-cell/>
          <table:table-cell table:style-name="Default" table:number-columns-repeated="16368"/>
        </table:table-row>
        <table:table-row table:style-name="ro2">
          <table:table-cell office:value-type="float" office:value="482" calcext:value-type="float">
            <text:p>482</text:p>
          </table:table-cell>
          <table:table-cell office:value-type="string" calcext:value-type="string">
            <text:p>Terrorism laws - For</text:p>
          </table:table-cell>
          <table:table-cell office:value-type="float" office:value="1053" calcext:value-type="float">
            <text:p>1053</text:p>
          </table:table-cell>
          <table:table-cell office:value-type="float" office:value="248" calcext:value-type="float">
            <text:p>248</text:p>
          </table:table-cell>
          <table:table-cell office:value-type="string" calcext:value-type="string">
            <text:p>David Howarth</text:p>
          </table:table-cell>
          <table:table-cell office:value-type="float" office:value="39" calcext:value-type="float">
            <text:p>39</text:p>
          </table:table-cell>
          <table:table-cell table:formula="of:=TRUE()" office:value-type="boolean" office:boolean-value="true" calcext:value-type="boolean">
            <text:p>TRUE</text:p>
          </table:table-cell>
          <table:table-cell office:value-type="string" calcext:value-type="string">
            <text:p>Terrorist Asset-Freezing (Temporary Provisions) Bill (Allocation of Time) – Temporary validity of certain Orders in Council</text:p>
            <text:p>amendment 4, page 1, leave out lines 9 to 11 and insert- 'are declared to have the same legal force as primary legislation'.</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555199526693198" calcext:value-type="float">
            <text:p>-0.555199526693198</text:p>
          </table:table-cell>
          <table:table-cell office:value-type="string" calcext:value-type="string">
            <text:p>2010-02-08</text:p>
          </table:table-cell>
          <table:table-cell office:value-type="float" office:value="0.590909090909091" calcext:value-type="float">
            <text:p>0.590909090909091</text:p>
          </table:table-cell>
          <table:table-cell office:value-type="string" calcext:value-type="string">
            <text:p>Important</text:p>
          </table:table-cell>
          <table:table-cell office:value-type="string" calcext:value-type="string">
            <text:p>LD</text:p>
          </table:table-cell>
          <table:table-cell table:style-name="Default" table:number-columns-repeated="16368"/>
        </table:table-row>
        <table:table-row table:style-name="ro2">
          <table:table-cell office:value-type="float" office:value="370" calcext:value-type="float">
            <text:p>370</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210" calcext:value-type="float">
            <text:p>210</text:p>
          </table:table-cell>
          <table:table-cell office:value-type="string" calcext:value-type="string">
            <text:p>Vernon Coaker</text:p>
          </table:table-cell>
          <table:table-cell office:value-type="float" office:value="35" calcext:value-type="float">
            <text:p>35</text:p>
          </table:table-cell>
          <table:table-cell table:formula="of:=TRUE()" office:value-type="boolean" office:boolean-value="true" calcext:value-type="boolean">
            <text:p>TRUE</text:p>
          </table:table-cell>
          <table:table-cell office:value-type="string" calcext:value-type="string">
            <text:p>Academy arrangements</text:p>
            <text:p>27, page 2, line 8, at end insert- (e) the school complies with provisions on pupil exclusions and behaviour partnerships as set out in EA 2002, EIA 2006 and ASCLA 2009.'.- (Vernon Coaker.)</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table:table-cell office:value-type="string" calcext:value-type="string">
            <text:p>2010-07-21</text:p>
          </table:table-cell>
          <table:table-cell office:value-type="float" office:value="0.590909090909091" calcext:value-type="float">
            <text:p>0.590909090909091</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63" calcext:value-type="float">
            <text:p>463</text:p>
          </table:table-cell>
          <table:table-cell office:value-type="string" calcext:value-type="string">
            <text:p>Terrorism laws - For</text:p>
          </table:table-cell>
          <table:table-cell office:value-type="float" office:value="1053" calcext:value-type="float">
            <text:p>1053</text:p>
          </table:table-cell>
          <table:table-cell office:value-type="float" office:value="102" calcext:value-type="float">
            <text:p>102</text:p>
          </table:table-cell>
          <table:table-cell office:value-type="string" calcext:value-type="string">
            <text:p>Dominic Grieve</text:p>
          </table:table-cell>
          <table:table-cell office:value-type="float" office:value="18" calcext:value-type="float">
            <text:p>18</text:p>
          </table:table-cell>
          <table:table-cell table:formula="of:=TRUE()" office:value-type="boolean" office:boolean-value="true" calcext:value-type="boolean">
            <text:p>TRUE</text:p>
          </table:table-cell>
          <table:table-cell office:value-type="string" calcext:value-type="string">
            <text:p>Terrorism Bill — Training for Terrorism</text:p>
            <text:p>amendment No. 57, in page 7, line 32, leave out 'or suspects'.</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219150327663939" calcext:value-type="float">
            <text:p>0.219150327663939</text:p>
          </table:table-cell>
          <table:table-cell office:value-type="string" calcext:value-type="string">
            <text:p>2005-11-03</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3">
          <table:table-cell office:value-type="float" office:value="380" calcext:value-type="float">
            <text:p>380</text:p>
          </table:table-cell>
          <table:table-cell office:value-type="string" calcext:value-type="string">
            <text:p>Stop climate change</text:p>
          </table:table-cell>
          <table:table-cell office:value-type="float" office:value="1030" calcext:value-type="float">
            <text:p>1030</text:p>
          </table:table-cell>
          <table:table-cell office:value-type="float" office:value="1841" calcext:value-type="float">
            <text:p>1841</text:p>
          </table:table-cell>
          <table:table-cell office:value-type="string" calcext:value-type="string">
            <text:p>David Lidington</text:p>
          </table:table-cell>
          <table:table-cell office:value-type="float" office:value="286" calcext:value-type="float">
            <text:p>286</text:p>
          </table:table-cell>
          <table:table-cell table:formula="of:=TRUE()" office:value-type="boolean" office:boolean-value="true" calcext:value-type="boolean">
            <text:p>TRUE</text:p>
          </table:table-cell>
          <table:table-cell office:value-type="string" calcext:value-type="string">
            <text:p>Environment, Food and Rural Affairs</text:p>
            <text:p>[Relevant documents: the Ninth Report of the Environment, Food and Rural Affairs Committee, Session 2001–02, on The Future of UK Agriculture in a Changing World (House of Commons Paper No. 550I), and the First Report from the Environmental Audit Committee, Session 2002–03, on Pesticides: The Voluntary Initiative (HC 100). Minutes of Evidence taken before the Environment, Food and Rural Affairs Committee: Foot and Mouth Disease 2001: Lessons to be Learned Inquiry, 23 July 2002 (Session 2001–02, HC 1144); The Royal Society Inquiry into Infectious Diseases in Livestock, 16 October 2002 (Session 2001–02, HC 1227); and Government Response to the Foot and Mouth Inquiry Reports and other matters arising, 21 November 2002 (Session 2002–03, HC 111).]</text:p>
            <text:p>To leave out from XHouse" to the end of the Question, and to add instead thereof: notes with concern the continuing recession in British agriculture; believes that a profitable farming and growing industry should be at the heart of a thriving rural economy; deplores the Government's mishandling of the foot and mouth epidemic and its failure to take effective action against illegal meat imports; calls upon the Government to reduce rather than increase the costs imposed on farmers and growers by unnecessary regulations; regrets the Government's failure to deliver on its promises to rural-proof its policies and to place sustainable development at the heart of policymaking and its failure to deliver on its own targets for recycling and carbon emissions; notes the repeated and trenchant criticisms made of the Department for Environment, Food and Rural Affairs by the Environment, Food and Rural Affairs and Environmental Audit Committees and believes that the time is now long overdue for the Government to turn fine words into effective action."</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02-12-12</text:p>
          </table:table-cell>
          <table:table-cell office:value-type="float" office:value="0.227272727272727" calcext:value-type="float">
            <text:p>0.227272727272727</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3">
          <table:table-cell office:value-type="float" office:value="480" calcext:value-type="float">
            <text:p>480</text:p>
          </table:table-cell>
          <table:table-cell office:value-type="string" calcext:value-type="string">
            <text:p>Terrorism laws - For</text:p>
          </table:table-cell>
          <table:table-cell office:value-type="float" office:value="1053" calcext:value-type="float">
            <text:p>1053</text:p>
          </table:table-cell>
          <table:table-cell office:value-type="float" office:value="8056" calcext:value-type="float">
            <text:p>8056</text:p>
          </table:table-cell>
          <table:table-cell office:value-type="string" calcext:value-type="string">
            <text:p>Sarah McCarthy-Fry</text:p>
          </table:table-cell>
          <table:table-cell office:value-type="float" office:value="1382" calcext:value-type="float">
            <text:p>1382</text:p>
          </table:table-cell>
          <table:table-cell table:formula="of:=TRUE()" office:value-type="boolean" office:boolean-value="true" calcext:value-type="boolean">
            <text:p>TRUE</text:p>
          </table:table-cell>
          <table:table-cell office:value-type="string" calcext:value-type="string">
            <text:p>Terrorist Asset-Freezing (Temporary Provisions) Bill (Allocation of Time)</text:p>
            <text:p>That the following provisions shall apply to the Terrorist Asset-Freezing (Temporary Provisions) Bill: Timetable 1.-(1) Proceedings on Second Reading, in Committee, on consideration and on Third Reading shall be completed at today's sitting in accordance with the following provisions of this paragraph. (2) Proceedings on Second Reading shall (so far as not previously concluded) be brought to a conclusion four hours after the commencement of proceedings on the Motion for this Order or at 8 pm (whichever is the earlier). (3) Proceedings in Committee, on consideration and on Third Reading shall (so far as not previously concluded) be brought to a conclusion at 10 pm. Timing of proceedings and Questions to be put 2. When the Bill has been read a second time- (a) it shall (Notwithstanding bills not subject to a programme order"&gt;Standing Order No. 63 (Committal of bills not subject to a programme order)) stand committed to a Committee of the whole House without any Question being put; (b) the Speaker shall leave the Chair whether or not notice of an Instruction has been given. 3.-(1) On the conclusion of proceedings in Committee, the Chairman shall report the Bill to the House without putting any Question. (2) If the Bill is reported with amendments, the House shall proceed to consider the Bill as amended without any Question being put. 4. For the purpose of bringing any proceedings to a conclusion in accordance with paragraph 1, the Chairman or Speaker shall forthwith put the following Questions (but no others)- (a) any Question already proposed from the Chair; (b) any Question necessary to bring to a decision a Question so proposed; (c) the Question on any amendment moved or Motion made by a Minister of the Crown; (d) any other Question necessary for the disposal of the business to be concluded. 5. On a Motion so made for a new Clause or a new Schedule, the Chairman or Speaker shall put only the Question that the Clause or Schedule be added to the Bill. 6. If two or more Questions would fall to be put under paragraph 4(d) in relation to successive provisions of the Bill, the Chairman shall instead put a single question in relation to those provisions. Consideration of Lords Amendments 7.-(1) Any Lords Amendments to the Bill shall be considered forthwith without any Question being put. (2) Proceedings on consideration of Lords Amendments shall (so far as not previously concluded) be brought to a conclusion one hour after their commencement. 8.-(1) This paragraph applies for the purpose of bringing any proceedings to a conclusion in accordance with paragraph 7. (2) The Speaker shall first put forthwith any Question already proposed from the Chair. (3) If that Question is for the amendment of a Lords Amendment the Speaker shall then put forthwith- (a) a single Question on any further Amendments to the Lords Amendment moved by a Minister of the Crown, and (b) the Question on any Motion made by a Minister of the Crown that this House agrees or disagrees to the Lords Amendment or (as the case may be) to the Lords Amendment as amended. (4) The Speaker shall then put forthwith- (a) a single Question on any Amendments moved by a Minister of the Crown to a Lords Amendment, and (b) the Question on any Motion made by a Minister of the Crown that this House agrees or disagrees to the Lords Amendment or (as the case may be) to the Lords Amendment as amended. (5) The Speaker shall then put forthwith the Question on any Motion made by a Minister of the Crown that this House disagrees to a Lords Amendment. (6) The Speaker shall then put forthwith the Question that this House agrees to all the remaining Lords Amendments. (7) As soon as the House has- (a) agreed or disagreed to a Lords Amendment, or (b) disposed of an Amendment relevant to a Lords Amendment which has been disagreed to, the Speaker shall put forthwith a single Question on any Amendments moved by a Minister of the Crown and relevant to the Lords Amendment. Subsequent stages 9.-(1) Any further Message from the Lords on the Bill shall be considered forthwith without any Question being put. (2) Proceedings on any further Message from the Lords shall (so far as not previously concluded) be brought to a conclusion one hour after their commencement. 10.-(1) This paragraph applies for the purpose of bringing any proceedings to a conclusion in accordance with paragraph 9. (2) The Speaker shall first put forthwith any Question which has been proposed from the Chair. (3) The Speaker shall then put forthwith the Question on any Motion made by a Minister of the Crown which is related to the Question already proposed from the Chair. (4) The Speaker shall then put forthwith the Question on any Motion made by a Minister of the Crown on or relevant to any of the remaining items in the Lords Message. (5) The Speaker shall then put forthwith the Question that this House agrees with the Lords in all the remaining Lords Proposals. Reasons Committee 11.-(1) The Speaker shall put forthwith the Question on any Motion made by a Minister of the Crown for the appointment, nomination and quorum of a Committee to draw up Reasons and the appointment of its Chairman. (2) A Committee appointed to draw up Reasons shall report before the conclusion of the sitting at which it is appointed. (3) Proceedings in the Committee shall (so far as not previously concluded) be brought to a conclusion 30 minutes after their commencement. (4) For the purpose of bringing any proceedings to a conclusion in accordance with sub paragraph (3), the Chairman shall- (a) first put forthwith any Question which has been proposed from the Chair, and (b) then put forthwith successively Questions on motions which may be made by a Minister of the Crown for assigning a Reason for disagreeing with the Lords in any of their Amendments. (5) The proceedings of the Committee shall be reported without any further Question being put. Miscellaneous 12. Paragraph (1) of Standing Order No. 15 (Exempted business) shall apply so far as necessary for the purposes of this Order. 13.-(1) The proceedings on any Motion made by a Minister of the Crown for varying or supplementing the provisions of this Order shall (so far as not previously concluded) be brought to a conclusion one hour after their commencement. (2) Paragraph (1) of Standing Order No. 15 (Exempted business) shall apply to those proceedings. 14. Standing Order No. 82 (Business Committee) shall not apply in relation to any proceedings to which this Order applies. 15.-(1) No Motion shall be made, except by a Minister of the Crown, to alter the order in which any proceedings on the Bill are taken or to recommit the Bill. (2) The Question on any such Motion shall be put forthwith. 16.-(1) No dilatory Motion shall be made in relation to proceedings to which this Order applies except by a Minister of the Crown. (2) The Question on any such Motion shall be put forthwith. 17. The Speaker may not arrange for a debate to be held in accordance with Standing Order No. 24 (Emergency debates)- (a) at today's sitting, or (b) at any sitting at which Lords Amendments to the Bill are, or any further Message from the Lords is, to be considered, before the conclusion of any proceedings to which this Order applies. 18.-(1) Sub-paragraph (2) applies if the House is adjourned, or the sitting is suspended, before the conclusion of any proceedings to which this Order applies. (2) No notice shall be required of a Motion made at the next sitting by a Minister of the Crown for varying or supplementing the provisions of this Order. 19. Proceedings to which this Order applies shall not be interrupted under any Standing Order relating to the sittings of the House. 20. The Speaker shall not adjourn the House at the sitting on the day on which the Bill is sent back to the House from the Lords until- (a) any Message from the Lords on the Bill has been received; (b) he has reported the Royal Assent to any Act agreed upon by both Houses.</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6552402923434" calcext:value-type="float">
            <text:p>1.56552402923434</text:p>
          </table:table-cell>
          <table:table-cell office:value-type="string" calcext:value-type="string">
            <text:p>2010-02-08</text:p>
          </table:table-cell>
          <table:table-cell office:value-type="float" office:value="0.590909090909091" calcext:value-type="float">
            <text:p>0.590909090909091</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83" calcext:value-type="float">
            <text:p>183</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196" calcext:value-type="float">
            <text:p>196</text:p>
          </table:table-cell>
          <table:table-cell office:value-type="string" calcext:value-type="string">
            <text:p>Ian Murray</text:p>
          </table:table-cell>
          <table:table-cell office:value-type="float" office:value="34" calcext:value-type="float">
            <text:p>34</text:p>
          </table:table-cell>
          <table:table-cell table:formula="of:=TRUE()" office:value-type="boolean" office:boolean-value="true" calcext:value-type="boolean">
            <text:p>TRUE</text:p>
          </table:table-cell>
          <table:table-cell office:value-type="string" calcext:value-type="string">
            <text:p>Scotland Bill – Housing Benefit</text:p>
            <text:p>“In Section F1 of Part 2 of Schedule 5 to the Scotland Act 1998, in the Exceptions, after exception 8 (see section 23 above) insert— “Exception 9 Housing benefit.””</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2955031946061" calcext:value-type="float">
            <text:p>1.52955031946061</text:p>
          </table:table-cell>
          <table:table-cell office:value-type="string" calcext:value-type="string">
            <text:p>2015-06-30</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12" calcext:value-type="float">
            <text:p>412</text:p>
          </table:table-cell>
          <table:table-cell office:value-type="string" calcext:value-type="string">
            <text:p>Stop climate change</text:p>
          </table:table-cell>
          <table:table-cell office:value-type="float" office:value="1030" calcext:value-type="float">
            <text:p>1030</text:p>
          </table:table-cell>
          <table:table-cell office:value-type="float" office:value="104" calcext:value-type="float">
            <text:p>104</text:p>
          </table:table-cell>
          <table:table-cell/>
          <table:table-cell office:value-type="float" office:value="17" calcext:value-type="float">
            <text:p>17</text:p>
          </table:table-cell>
          <table:table-cell table:formula="of:=TRUE()" office:value-type="boolean" office:boolean-value="true" calcext:value-type="boolean">
            <text:p>TRUE</text:p>
          </table:table-cell>
          <table:table-cell office:value-type="string" calcext:value-type="string">
            <text:p>CCL: removal of exemption for electricity from renewable sources</text:p>
            <text:p>That the clause stand part of the Bill.</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office:value-type="float" office:value="0.2029230208513" calcext:value-type="float">
            <text:p>0.2029230208513</text:p>
          </table:table-cell>
          <table:table-cell office:value-type="string" calcext:value-type="string">
            <text:p>2015-09-08</text:p>
          </table:table-cell>
          <table:table-cell office:value-type="float" office:value="0.818181818181818" calcext:value-type="float">
            <text:p>0.818181818181818</text:p>
          </table:table-cell>
          <table:table-cell office:value-type="string" calcext:value-type="string">
            <text:p>Important</text:p>
          </table:table-cell>
          <table:table-cell/>
          <table:table-cell table:style-name="Default" table:number-columns-repeated="16368"/>
        </table:table-row>
        <table:table-row table:style-name="ro2">
          <table:table-cell office:value-type="float" office:value="164" calcext:value-type="float">
            <text:p>164</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279" calcext:value-type="float">
            <text:p>279</text:p>
          </table:table-cell>
          <table:table-cell office:value-type="string" calcext:value-type="string">
            <text:p>Stewart Hosie</text:p>
          </table:table-cell>
          <table:table-cell office:value-type="float" office:value="49" calcext:value-type="float">
            <text:p>49</text:p>
          </table:table-cell>
          <table:table-cell table:formula="of:=TRUE()" office:value-type="boolean" office:boolean-value="true" calcext:value-type="boolean">
            <text:p>TRUE</text:p>
          </table:table-cell>
          <table:table-cell office:value-type="string" calcext:value-type="string">
            <text:p>Scotland Bill – Borrowing by the Scottish Ministers</text:p>
            <text:p>amendment 51, page 24, line 20, leave out from ‘which’ to end of line 22 and insert— ‘are required by them to meet current expenditure because of a shortfall in receipts from the Scottish rate of income tax or devolved taxes.’.</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11-03-14</text:p>
          </table:table-cell>
          <table:table-cell office:value-type="float" office:value="0.636363636363636" calcext:value-type="float">
            <text:p>0.636363636363636</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369" calcext:value-type="float">
            <text:p>369</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190" calcext:value-type="float">
            <text:p>190</text:p>
          </table:table-cell>
          <table:table-cell office:value-type="string" calcext:value-type="string">
            <text:p>Diana R. Johnson</text:p>
          </table:table-cell>
          <table:table-cell office:value-type="float" office:value="34" calcext:value-type="float">
            <text:p>34</text:p>
          </table:table-cell>
          <table:table-cell table:formula="of:=TRUE()" office:value-type="boolean" office:boolean-value="true" calcext:value-type="boolean">
            <text:p>TRUE</text:p>
          </table:table-cell>
          <table:table-cell office:value-type="string" calcext:value-type="string">
            <text:p>Academy arrangements</text:p>
            <text:p>23, page 2, line 8, at end insert- (e) the school must comply with the provisions of the Code for School Admissions issued from time to time by the Secretary of Stat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table:table-cell office:value-type="string" calcext:value-type="string">
            <text:p>2010-07-21</text:p>
          </table:table-cell>
          <table:table-cell office:value-type="float" office:value="0.590909090909091" calcext:value-type="float">
            <text:p>0.590909090909091</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3">
          <table:table-cell office:value-type="float" office:value="461" calcext:value-type="float">
            <text:p>461</text:p>
          </table:table-cell>
          <table:table-cell office:value-type="string" calcext:value-type="string">
            <text:p>Terrorism laws - For</text:p>
          </table:table-cell>
          <table:table-cell office:value-type="float" office:value="1053" calcext:value-type="float">
            <text:p>1053</text:p>
          </table:table-cell>
          <table:table-cell office:value-type="float" office:value="166" calcext:value-type="float">
            <text:p>166</text:p>
          </table:table-cell>
          <table:table-cell office:value-type="string" calcext:value-type="string">
            <text:p>Robert Marshall-Andrews</text:p>
          </table:table-cell>
          <table:table-cell office:value-type="float" office:value="29" calcext:value-type="float">
            <text:p>29</text:p>
          </table:table-cell>
          <table:table-cell table:formula="of:=TRUE()" office:value-type="boolean" office:boolean-value="true" calcext:value-type="boolean">
            <text:p>TRUE</text:p>
          </table:table-cell>
          <table:table-cell office:value-type="string" calcext:value-type="string">
            <text:p>Terrorism Bill — Encouragement of Terrorism</text:p>
            <text:p>No. 22, page 1, line 14, at end insert 'and intends that his statement shall have that effect'.</text:p>
            <text:p>That the amendment be mad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2.16325472330546" calcext:value-type="float">
            <text:p>2.16325472330546</text:p>
          </table:table-cell>
          <table:table-cell office:value-type="string" calcext:value-type="string">
            <text:p>2005-11-02</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47" calcext:value-type="float">
            <text:p>447</text:p>
          </table:table-cell>
          <table:table-cell office:value-type="string" calcext:value-type="string">
            <text:p>Terrorism laws - For</text:p>
          </table:table-cell>
          <table:table-cell office:value-type="float" office:value="1053" calcext:value-type="float">
            <text:p>1053</text:p>
          </table:table-cell>
          <table:table-cell office:value-type="float" office:value="3579" calcext:value-type="float">
            <text:p>3579</text:p>
          </table:table-cell>
          <table:table-cell office:value-type="string" calcext:value-type="string">
            <text:p>Dominic Grieve</text:p>
          </table:table-cell>
          <table:table-cell office:value-type="float" office:value="592" calcext:value-type="float">
            <text:p>592</text:p>
          </table:table-cell>
          <table:table-cell table:formula="of:=TRUE()" office:value-type="boolean" office:boolean-value="true" calcext:value-type="boolean">
            <text:p>TRUE</text:p>
          </table:table-cell>
          <table:table-cell office:value-type="string" calcext:value-type="string">
            <text:p>Prevention of Terrorism Bill – Power to make control orders</text:p>
            <text:p>(1) An application for an order under this section may be made by the Secretary of State if he is satisfied that the following conditions are fulfilled with respect to any person, namely: (a) that the person is or has been involved in terrorism-related activity; (b) that, having regard to all the evidence that would be admissible in criminal proceedings, there is no realistic prospect for conviction of that person for any criminal offence relating to their involvement in such activity; and (c) that such an order is necessary, for the purposes connected with protecting members of the public from the risk of terrorism, to make an order imposing obligations on the individual. (2) The Secretary of State shall not make such an application without consulting the Director of Public Prosecutions. (3) Such an application shall be made to: (a) the High Court in England and Wales in respect of persons resident in England or Wales, (b) the Outer House of the Court of Session in respect of persons resident in Scotland; and  (c) the High Court in Northern Ireland in respect of persons resident in Northern Ireland. (4) If, on such an application, it is proved that the conditions set out in subsection 1(1) are fulfilled, the court may make an order under this section (a "control order") imposing any of the obligations set out in subsection 1(8). (5) For the purpose of determining whether the condition mentioned in subsection 1(a) above is fulfilled, the court shall disregard any act of the defendant which he shows was reasonable in the circumstances. (6) In determining whether the condition mentioned in subsection (1)(a) is fulfilled, the court must apply the criminal standard of proof. (7) The obligations that may be imposed on a defendant under this section are limited to the following: (a) a prohibition or restriction on his possession or use of specified articles or substances; (b) a restriction on his use of specified services or specified facilities, or on his carrying on specified activities; (c) a restriction on his association or communications with specified persons or with other persons generally; (d) a prohibition on his being at specified places or within a specified area at specified times or on specified days; and (e) a requirement on him to report to a specified person at specified times and places. (8) The court shall not impose any obligation under subsection (7) unless it is satisfied that the following conditions apply: (a) that the obligation is necessary for the purposes connected with protecting members of the public from the risk of terrorism; (b) that the same purposes could not be achieved by less restrictive means; and (c) that the obligation is consistent with the defendant's Convention rights within the meaning of the Human Rights Act 1998 (c. 42). (9) The Secretary of State or the defendant may apply to the court which made the control order for it to be varied or discharged by further order. (10) For the purposes of this Act, involvement in terrorism-related activity is any one or more of the following: (a) the commission, preparation or instigation of acts of terrorism; (b) conduct which knowingly facilitates the commission, preparation or instigation of such acts, or which is intended to do so; and (c) conduct which knowingly gives encouragement to the commission, preparation or instigation of such acts, or which is intended to do so. (11) Evidence established to have been obtained under torture shall not be admitted in any proceedings.'.</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648709887589643" calcext:value-type="float">
            <text:p>0.648709887589643</text:p>
          </table:table-cell>
          <table:table-cell office:value-type="string" calcext:value-type="string">
            <text:p>2005-02-28</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188" calcext:value-type="float">
            <text:p>188</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298" calcext:value-type="float">
            <text:p>298</text:p>
          </table:table-cell>
          <table:table-cell office:value-type="string" calcext:value-type="string">
            <text:p>Angus Robertson</text:p>
          </table:table-cell>
          <table:table-cell office:value-type="float" office:value="47" calcext:value-type="float">
            <text:p>47</text:p>
          </table:table-cell>
          <table:table-cell table:formula="of:=TRUE()" office:value-type="boolean" office:boolean-value="true" calcext:value-type="boolean">
            <text:p>TRUE</text:p>
          </table:table-cell>
          <table:table-cell office:value-type="string" calcext:value-type="string">
            <text:p>Scotland Bill (Programme) (No.2) – Scottish independence referendum</text:p>
            <text:p>‘(1) Paragraph 5A in Part 1 of Schedule 5 to the Scotland Act 1998 (general reservations) is amended as follows. (2) In sub-paragraph (1), leave out “if the following requirements are met”. (3) Leave out sub-paragraphs (2) to (4).</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823170583961915" calcext:value-type="float">
            <text:p>0.823170583961915</text:p>
          </table:table-cell>
          <table:table-cell office:value-type="string" calcext:value-type="string">
            <text:p>2015-11-09</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180" calcext:value-type="float">
            <text:p>180</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344" calcext:value-type="float">
            <text:p>344</text:p>
          </table:table-cell>
          <table:table-cell office:value-type="string" calcext:value-type="string">
            <text:p>Ian Murray</text:p>
          </table:table-cell>
          <table:table-cell office:value-type="float" office:value="57" calcext:value-type="float">
            <text:p>57</text:p>
          </table:table-cell>
          <table:table-cell table:formula="of:=TRUE()" office:value-type="boolean" office:boolean-value="true" calcext:value-type="boolean">
            <text:p>TRUE</text:p>
          </table:table-cell>
          <table:table-cell office:value-type="string" calcext:value-type="string">
            <text:p>Scotland Bill – Disability, industrial injuries and carer’s benefits</text:p>
            <text:p>amendment 128, page 21, line 39, leave out from “of”bto the end of line 7 on page 22 and insert “a disabled person or person with a physical or mental impairment or health condition in respect of effects or needs arising from that disability, impairment or health condition.”</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0557249122886946" calcext:value-type="float">
            <text:p>0.0557249122886946</text:p>
          </table:table-cell>
          <table:table-cell office:value-type="string" calcext:value-type="string">
            <text:p>2015-06-30</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65" calcext:value-type="float">
            <text:p>465</text:p>
          </table:table-cell>
          <table:table-cell office:value-type="string" calcext:value-type="string">
            <text:p>Terrorism laws - For</text:p>
          </table:table-cell>
          <table:table-cell office:value-type="float" office:value="1053" calcext:value-type="float">
            <text:p>1053</text:p>
          </table:table-cell>
          <table:table-cell office:value-type="float" office:value="194" calcext:value-type="float">
            <text:p>194</text:p>
          </table:table-cell>
          <table:table-cell/>
          <table:table-cell office:value-type="float" office:value="37" calcext:value-type="float">
            <text:p>37</text:p>
          </table:table-cell>
          <table:table-cell table:formula="of:=TRUE()" office:value-type="boolean" office:boolean-value="true" calcext:value-type="boolean">
            <text:p>TRUE</text:p>
          </table:table-cell>
          <table:table-cell office:value-type="string" calcext:value-type="string">
            <text:p>Terrorism Bill — Commission of offences abroad</text:p>
            <text:p>No. 91, in clause 17, page 16, line 5, at end insert 'and (c) the action involves harm or the threat of harm to a national of the United Kingdom.'.</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7745327976347" calcext:value-type="float">
            <text:p>1.57745327976347</text:p>
          </table:table-cell>
          <table:table-cell office:value-type="string" calcext:value-type="string">
            <text:p>2005-11-03</text:p>
          </table:table-cell>
          <table:table-cell office:value-type="float" office:value="0.363636363636364" calcext:value-type="float">
            <text:p>0.363636363636364</text:p>
          </table:table-cell>
          <table:table-cell office:value-type="string" calcext:value-type="string">
            <text:p>Not important</text:p>
          </table:table-cell>
          <table:table-cell/>
          <table:table-cell table:style-name="Default" table:number-columns-repeated="16368"/>
        </table:table-row>
        <table:table-row table:style-name="ro2">
          <table:table-cell office:value-type="float" office:value="244" calcext:value-type="float">
            <text:p>244</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2631" calcext:value-type="float">
            <text:p>2631</text:p>
          </table:table-cell>
          <table:table-cell office:value-type="string" calcext:value-type="string">
            <text:p>Barbara Keeley</text:p>
          </table:table-cell>
          <table:table-cell office:value-type="float" office:value="429" calcext:value-type="float">
            <text:p>429</text:p>
          </table:table-cell>
          <table:table-cell table:formula="of:=TRUE()" office:value-type="boolean" office:boolean-value="true" calcext:value-type="boolean">
            <text:p>TRUE</text:p>
          </table:table-cell>
          <table:table-cell office:value-type="string" calcext:value-type="string">
            <text:p>Localism Bill (Ways and Means) – Powers to make supplemental provision</text:p>
            <text:p>37, page 4, line 22, at end insert— ‘(6A) The power under subsection (1) or (2) may not be exercised to amend, repeal, revoke or disapply— (a) this Part of this Act, (b) Public Libraries and Museums Act 1964 section 7 or section 13, (c) Small Holdings and Allotments Act 1908 section 23, (d) Children Act 1989 Part 3 and Schedule 2, (e) Childcare Act 2006, Parts 1 and 2, (f) Child Poverty Act 2010 Part 2, (g) Equality Act 2010, section 88, (h) Equality Act 2010, section 149, (i) Care Standards Act 2000, (j) Chronically Sick and Disabled Persons Act 1970 section 21, (k) Transport Act 2000 section 145A, (l) Local Authorities’ Traffic Orders (Exemptions for Disabled Persons) (England) Regulations 2000, (m) Disabled Persons (Badges for Motor Vehicles) (England) (Amendment) Regulations 2007, (n) Disabled Persons (Badges for Motor Vehicles) (England) (Amendment No. 2) Regulations 2007, (o) Carers and Disabled Children Act 2000, (p) Carers (Recognition and Services) Act 1995, (q) Disabled Persons (Services, Consultation and Representation) Act 1986, (r) Mental Health Act 1983 Part 8, (s) Community Care, Services for Carers and Children Services (Direct Payments) England Regulations 2009, (t) Public Health Act 1875, (u) Public Health Act 1936, (v) Commons Act 2006, (w) Countryside and Rights of Way Act 2000, (x) Natural Environment and Rural Communities Act 2006 section 40, (y) Wildlife and Countryside Act 1981 section 25 or section 28E, (z) Environment Act 1995 Part 4, (z1) Dangerous Wild Animals Act 1976, (z2) Prevention of Damage by Pests Act 1949, (z3) Hedgerow Regulations 1997, (z4) Planning (Listed Building and Conservation Areas) Act 1990 section 66 or section 72, (z5) Ancient Monument and Archaeological Areas Act 1979 sections 12 and 13, (z6) National Parks and Access to the Countryside Act 1949, (z7) Animal Welfare Act 2006 section 30, (z8) Zoo Licensing Act 1981, (z9) Marine and Coastal Access Act 2009 Part 6, (z10) Flood and Water Management Act 2010 Schedule 3, (z11) Working Time Regulations 1998 Regulation 28, (z12) Education Act 1996 section 15ZA, (z13) Food Safety Act 1990 Parts 1, 2 and 3, (z14) Freedom of Information Act 2000, (z15) Housing Grants, Construction and Regeneration Act 1996 section 1, (z16) Housing Act 1996 Part 7, (z17) Homelessness Act 2002, (z18) Housing Act 2004 Part 2, (z19) Local Government Act 1972 Part VA, section 99 or section 148, (z20) Local Government Act 2000 Part 3 section 21 or section 37, (z21) Children and Young Persons Act 1969 Part 1, or (z22) Adoption and Children Act 2002.’.</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11-05-17</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97" calcext:value-type="float">
            <text:p>297</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98" calcext:value-type="float">
            <text:p>98</text:p>
          </table:table-cell>
          <table:table-cell office:value-type="string" calcext:value-type="string">
            <text:p>Chris Grayling</text:p>
          </table:table-cell>
          <table:table-cell office:value-type="float" office:value="14" calcext:value-type="float">
            <text:p>14</text:p>
          </table:table-cell>
          <table:table-cell table:formula="of:=TRUE()" office:value-type="boolean" office:boolean-value="true" calcext:value-type="boolean">
            <text:p>TRUE</text:p>
          </table:table-cell>
          <table:table-cell office:value-type="string" calcext:value-type="string">
            <text:p>Period of entitlement to contributory allowance</text:p>
            <text:p>That this House disagrees with Lords amendment 15.</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office:value-type="float" office:value="-0.725743813153466" calcext:value-type="float">
            <text:p>-0.725743813153466</text:p>
          </table:table-cell>
          <table:table-cell office:value-type="string" calcext:value-type="string">
            <text:p>2012-02-01</text:p>
          </table:table-cell>
          <table:table-cell office:value-type="float" office:value="0.681818181818182" calcext:value-type="float">
            <text:p>0.681818181818182</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34" calcext:value-type="float">
            <text:p>434</text:p>
          </table:table-cell>
          <table:table-cell office:value-type="string" calcext:value-type="string">
            <text:p>Terrorism laws - For</text:p>
          </table:table-cell>
          <table:table-cell office:value-type="float" office:value="1053" calcext:value-type="float">
            <text:p>1053</text:p>
          </table:table-cell>
          <table:table-cell office:value-type="float" office:value="1004" calcext:value-type="float">
            <text:p>1004</text:p>
          </table:table-cell>
          <table:table-cell office:value-type="string" calcext:value-type="string">
            <text:p>Nick Ainger</text:p>
          </table:table-cell>
          <table:table-cell office:value-type="float" office:value="162" calcext:value-type="float">
            <text:p>162</text:p>
          </table:table-cell>
          <table:table-cell table:formula="of:=TRUE()" office:value-type="boolean" office:boolean-value="true" calcext:value-type="boolean">
            <text:p>TRUE</text:p>
          </table:table-cell>
          <table:table-cell office:value-type="string" calcext:value-type="string">
            <text:p>Anti-terrorism, Crime and Security Bill (Programme No. 3)</text:p>
            <text:p>Motion made, and Question put forthwith, pursuant to Order [28 June], That the following provisions shall apply to the Anti-terrorism, Crime and Security Bill for the purpose of supplementing the Order of 19th November: Consideration of Lords Amendments 1.—(1) Proceedings on Consideration of Lords Amendments shall be completed at today's sitting and shall be brought to a conclusion (so far as not previously concluded) at midnight. (2) Those proceedings shall be taken in the order shown in the following Table and shall be brought to a conclusion (so far as not previously concluded) at the time specified in the second column of the Table. Subsequent stages2.— (1) Any further Message from the Lords on the bill shall be considered forthwith without any Question put. (2) The proceedings on any further Message from the Lords on the Bill shall be brought to a conclusion (so far as not previously concluded) one hour after their commencement</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01-12-12</text:p>
          </table:table-cell>
          <table:table-cell office:value-type="float" office:value="0.181818181818182" calcext:value-type="float">
            <text:p>0.181818181818182</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56" calcext:value-type="float">
            <text:p>356</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428" calcext:value-type="float">
            <text:p>428</text:p>
          </table:table-cell>
          <table:table-cell office:value-type="string" calcext:value-type="string">
            <text:p>John Grogan</text:p>
          </table:table-cell>
          <table:table-cell office:value-type="float" office:value="69" calcext:value-type="float">
            <text:p>69</text:p>
          </table:table-cell>
          <table:table-cell table:formula="of:=TRUE()" office:value-type="boolean" office:boolean-value="true" calcext:value-type="boolean">
            <text:p>TRUE</text:p>
          </table:table-cell>
          <table:table-cell office:value-type="string" calcext:value-type="string">
            <text:p>Ballot of parents on change of category from community school to foundation school</text:p>
            <text:p>(1) A proposal for a prescribed alteration involving a change of category from community school to foundation school may be implemented only if the proposal has been approved by a ballot of parents of pupils attending the school to which the proposal relates. (2) The Secretary of State may make regulations about ballots under subsection (1).'.</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table:table-cell office:value-type="string" calcext:value-type="string">
            <text:p>2006-05-23</text:p>
          </table:table-cell>
          <table:table-cell office:value-type="float" office:value="0.409090909090909" calcext:value-type="float">
            <text:p>0.409090909090909</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3">
          <table:table-cell office:value-type="float" office:value="414" calcext:value-type="float">
            <text:p>414</text:p>
          </table:table-cell>
          <table:table-cell office:value-type="string" calcext:value-type="string">
            <text:p>Stop climate change</text:p>
          </table:table-cell>
          <table:table-cell office:value-type="float" office:value="1030" calcext:value-type="float">
            <text:p>1030</text:p>
          </table:table-cell>
          <table:table-cell office:value-type="float" office:value="600" calcext:value-type="float">
            <text:p>600</text:p>
          </table:table-cell>
          <table:table-cell office:value-type="string" calcext:value-type="string">
            <text:p>Eilidh Whiteford</text:p>
          </table:table-cell>
          <table:table-cell office:value-type="float" office:value="103" calcext:value-type="float">
            <text:p>103</text:p>
          </table:table-cell>
          <table:table-cell table:formula="of:=TRUE()" office:value-type="boolean" office:boolean-value="true" calcext:value-type="boolean">
            <text:p>TRUE</text:p>
          </table:table-cell>
          <table:table-cell office:value-type="string" calcext:value-type="string">
            <text:p>Energy Bill [Lords] – Decarbonisation target range</text:p>
            <text:p>“(1) Section 1 of the Energy Act 2013 is amended as follows. (2) Leave out subsection (2) and insert— “(2) The Secretary of State must by order (“a decarbonisation order”) set a decarbonisation target range, which shall be reviewed annually thereafter.” (3) Leave out subsection (5) and insert— “(5) The decarbonisation order shall be made within six months of the adoption of the fifth carbon budget set by virtue of the duty of the Secretary of State under section 4 (2) (b) of the climate Change Act 2008.””</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4750520133006" calcext:value-type="float">
            <text:p>1.54750520133006</text:p>
          </table:table-cell>
          <table:table-cell office:value-type="string" calcext:value-type="string">
            <text:p>2016-03-14</text:p>
          </table:table-cell>
          <table:table-cell office:value-type="float" office:value="0.863636363636364" calcext:value-type="float">
            <text:p>0.863636363636364</text:p>
          </table:table-cell>
          <table:table-cell office:value-type="string" calcext:value-type="string">
            <text:p>Important</text:p>
          </table:table-cell>
          <table:table-cell office:value-type="string" calcext:value-type="string">
            <text:p>SNP</text:p>
          </table:table-cell>
          <table:table-cell table:style-name="Default" table:number-columns-repeated="16368"/>
        </table:table-row>
        <table:table-row table:style-name="ro3">
          <table:table-cell office:value-type="float" office:value="468" calcext:value-type="float">
            <text:p>468</text:p>
          </table:table-cell>
          <table:table-cell office:value-type="string" calcext:value-type="string">
            <text:p>Terrorism laws - For</text:p>
          </table:table-cell>
          <table:table-cell office:value-type="float" office:value="1053" calcext:value-type="float">
            <text:p>1053</text:p>
          </table:table-cell>
          <table:table-cell office:value-type="float" office:value="175" calcext:value-type="float">
            <text:p>175</text:p>
          </table:table-cell>
          <table:table-cell office:value-type="string" calcext:value-type="string">
            <text:p>David Winnick</text:p>
          </table:table-cell>
          <table:table-cell office:value-type="float" office:value="31" calcext:value-type="float">
            <text:p>31</text:p>
          </table:table-cell>
          <table:table-cell table:formula="of:=TRUE()" office:value-type="boolean" office:boolean-value="true" calcext:value-type="boolean">
            <text:p>TRUE</text:p>
          </table:table-cell>
          <table:table-cell office:value-type="string" calcext:value-type="string">
            <text:p>Terrorism Bill – Extension of period of detention by judicial Authority</text:p>
            <text:p>No. 1, in page 22, line 19, leave   out "three months" and insert "28 days".</text:p>
            <text:p>That the amendment be mad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607896509716539" calcext:value-type="float">
            <text:p>0.607896509716539</text:p>
          </table:table-cell>
          <table:table-cell office:value-type="string" calcext:value-type="string">
            <text:p>2005-11-09</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13" calcext:value-type="float">
            <text:p>313</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1180" calcext:value-type="float">
            <text:p>1180</text:p>
          </table:table-cell>
          <table:table-cell office:value-type="string" calcext:value-type="string">
            <text:p>Eilidh Whiteford</text:p>
          </table:table-cell>
          <table:table-cell office:value-type="float" office:value="173" calcext:value-type="float">
            <text:p>173</text:p>
          </table:table-cell>
          <table:table-cell table:formula="of:=TRUE()" office:value-type="boolean" office:boolean-value="true" calcext:value-type="boolean">
            <text:p>TRUE</text:p>
          </table:table-cell>
          <table:table-cell office:value-type="string" calcext:value-type="string">
            <text:p>Housing Benefit (Under-occupancy Penalty)</text:p>
            <text:p>That this House deplores and opposes the Government’s introduction of the housing benefit under-occupancy penalty; believes it to be unjust and unworkable; notes growing public anger at its introduction; believes that the Government is showing a reckless lack of care and attention to the consequences of its introduction for low-income households affected by disability; further believes that it will adversely affect, amongst others, families of service personnel, foster families and those struggling with the effects of family breakdown; notes that some parts of the UK will be disproportionately hit because of the mismatch between the available social housing stock and the needs of tenants; further notes that according to the Department for Work and Pensions’ Equality Impact Assessment, 63 per cent of the 660,000 claimants affected by the under-occupancy penalty or their partners are disabled; believes that the measure unfairly penalises tenants in rural and inner-city areas; further believes the under-occupancy penalty will fail to meet its stated objectives; and calls on the Government to abandon this policy immediately.</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122009814645361" calcext:value-type="float">
            <text:p>0.122009814645361</text:p>
          </table:table-cell>
          <table:table-cell office:value-type="string" calcext:value-type="string">
            <text:p>2013-02-27</text:p>
          </table:table-cell>
          <table:table-cell office:value-type="float" office:value="0.727272727272727" calcext:value-type="float">
            <text:p>0.727272727272727</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3">
          <table:table-cell office:value-type="float" office:value="345" calcext:value-type="float">
            <text:p>345</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4445" calcext:value-type="float">
            <text:p>4445</text:p>
          </table:table-cell>
          <table:table-cell office:value-type="string" calcext:value-type="string">
            <text:p>Stephen Dorrell</text:p>
          </table:table-cell>
          <table:table-cell office:value-type="float" office:value="760" calcext:value-type="float">
            <text:p>760</text:p>
          </table:table-cell>
          <table:table-cell table:formula="of:=TRUE()" office:value-type="boolean" office:boolean-value="true" calcext:value-type="boolean">
            <text:p>TRUE</text:p>
          </table:table-cell>
          <table:table-cell office:value-type="string" calcext:value-type="string">
            <text:p>GRANT MAINTAINED SCHOOLS</text:p>
            <text:p>(1) Where a school is a grant maintained school within the meaning of the Education Act 1996 at the beginning of the 1998–99 school year— (a) the provisions of this clause shall have effect for prescribing the procedure for altering the school's status so that it is no longer a grant maintained school; and(b) the status of the school as a grant maintained school shall not be so altered except in accordance with the provisions of this clause. (2) The Secretary of State may by regulations make provision for ballots of parents to be held, at their request, for determining whether the grant maintained school to which such a ballot relates should retain its status as a grant maintained school.   (3) Ballot regulations may make provision—  (a) for determining the parents who are eligible to request and vote in a ballot under this section, provided that such determination shall include only parents of children for the time being in the school or who have accepted an offer of a place in the school; (b) requiring a request for such a ballot to be made by means of a petition signed by such number eligible parents as may be specified in or determined in accordance with the regulations; (c) prescribing the form of any petition and other requirements (whether as to the procedure to be followed or otherwise) which are to be complied with in relation to any such petition; (d) prescribing the body ("the designated body") to which any such petition is to be sent and which, under arrangements made by Secretary of State, is to— (i) make the arrangements for the holding of ballots under this section, and (ii) discharge such other functions with respect to such petitions and the holding of such ballots as may be prescribed (which may include the determination of any question arising as to the validity of any request for a ballot); (e) requiring prescribed bodies or persons, or bodies or persons falling within any prescribed category— (i) to provide the designated body or any other person with any prescribed information requested by that body or person, or (ii) to publish prescribed information in such manner as may be prescribed; (f) prescribing the terms of the question on which a ballot under this section is to be held and the manner in which such a ballot is to be conducted; (g) specify how the result of such a ballot is to be ascertained; (h) enabling the Secretary of State, in any prescribed circumstances, to declare a previous ballot under this section void and require the holding of a fresh ballot; (i) requiring anything falling to be done under the regulations to be done within such period as may be specified in or determined in accordance with the regulations; (4) Ballot regulations may provide for a request for a ballot under this section to be made, in any prescribed circumstances, by means of two or more petitions.   (5) The information required to be provided in pursuance of subsection (3)(e) may include the names and addresses of parents of any prescribed description.   (6) Where—  (a) a ballot has been held under this section, and (b) the result of the ballot was to the effect that the schools or school in question should retain grant-maintained status, no further ballot relating to the schools or school shall be held under this section within five years.   (7) An authority or body to whom this subsection applies shall not—  (a) publish any material which, in whole or in part, appears designed to influence the result of a ballot under this section, o (b) give any financial or other assistance to a person for the publication of material, which the authority or body are prohibited by this subsection from publishing themselves, o (c) otherwise incur any expenditure, or give any assistance, for the purpose of influencing the outcome of a ballot under this section. (8) Subsection (7) applies to—  (a) any local education authority, and (b) the governing body of any maintained school within the meaning of section 95 and in the case of the governing body of such a school which has a delegated budget within the meaning of Part II of this Act (or, in relation to any time before the appointed day, Part II of the Education Act 1996) the reference to expenditure in subsection (7)(c) is to expenditure out of the school's budget share.  (9) In this section, "ballot regulations" means regulations made under this section.'</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27674857582031" calcext:value-type="float">
            <text:p>-1.27674857582031</text:p>
          </table:table-cell>
          <table:table-cell office:value-type="string" calcext:value-type="string">
            <text:p>1998-03-11</text:p>
          </table:table-cell>
          <table:table-cell office:value-type="float" office:value="0.0454545454545454" calcext:value-type="float">
            <text:p>0.0454545454545454</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11" calcext:value-type="float">
            <text:p>411</text:p>
          </table:table-cell>
          <table:table-cell office:value-type="string" calcext:value-type="string">
            <text:p>Stop climate change</text:p>
          </table:table-cell>
          <table:table-cell office:value-type="float" office:value="1030" calcext:value-type="float">
            <text:p>1030</text:p>
          </table:table-cell>
          <table:table-cell office:value-type="float" office:value="309" calcext:value-type="float">
            <text:p>309</text:p>
          </table:table-cell>
          <table:table-cell/>
          <table:table-cell office:value-type="float" office:value="47" calcext:value-type="float">
            <text:p>47</text:p>
          </table:table-cell>
          <table:table-cell table:formula="of:=TRUE()" office:value-type="boolean" office:boolean-value="true" calcext:value-type="boolean">
            <text:p>TRUE</text:p>
          </table:table-cell>
          <table:table-cell office:value-type="string" calcext:value-type="string">
            <text:p>Climate Change Levy: Removal of Exemption for Electricity from Renewable Sources</text:p>
            <text:p>That in paragraph 19 of Schedule 6 to the Finance Act 2000 (climate change levy: exemption for electricity from renewable sources), in sub-paragraph (3), before paragraph (a) insert— “(za) it is generated before 1 August 2015;”.</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632931817755511" calcext:value-type="float">
            <text:p>0.632931817755511</text:p>
          </table:table-cell>
          <table:table-cell office:value-type="string" calcext:value-type="string">
            <text:p>2015-07-14</text:p>
          </table:table-cell>
          <table:table-cell office:value-type="float" office:value="0.818181818181818" calcext:value-type="float">
            <text:p>0.818181818181818</text:p>
          </table:table-cell>
          <table:table-cell office:value-type="string" calcext:value-type="string">
            <text:p>Not important</text:p>
          </table:table-cell>
          <table:table-cell/>
          <table:table-cell table:style-name="Default" table:number-columns-repeated="16368"/>
        </table:table-row>
        <table:table-row table:style-name="ro2">
          <table:table-cell office:value-type="float" office:value="264" calcext:value-type="float">
            <text:p>264</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897" calcext:value-type="float">
            <text:p>897</text:p>
          </table:table-cell>
          <table:table-cell office:value-type="string" calcext:value-type="string">
            <text:p>Helen Grant</text:p>
          </table:table-cell>
          <table:table-cell office:value-type="float" office:value="136" calcext:value-type="float">
            <text:p>136</text:p>
          </table:table-cell>
          <table:table-cell table:formula="of:=TRUE()" office:value-type="boolean" office:boolean-value="true" calcext:value-type="boolean">
            <text:p>TRUE</text:p>
          </table:table-cell>
          <table:table-cell office:value-type="string" calcext:value-type="string">
            <text:p>Fixed Odds Betting Terminals</text:p>
            <text:p>That this House understands the public concerns around fixed odds betting terminals regulated by the Gambling Act 2005; notes that the Government has made clear that it considers the future of B2 regulation to be unresolved; welcomes the Government-backed research into the effect of fixed odds betting terminals on problem gambling; believes that any development in the Government’s policy on this matter should be evidence-led; calls upon the betting industry to provide the data required for a proper understanding of the impact of fixed odds betting terminals; and further notes that local authorities already have planning powers to tackle localised problems and target specific areas where the cumulative impact of betting shops or other specific types of premises might be problematic, as well as licensing powers to tackle individual premises causing problems.</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54491908680895" calcext:value-type="float">
            <text:p>-0.54491908680895</text:p>
          </table:table-cell>
          <table:table-cell office:value-type="string" calcext:value-type="string">
            <text:p>2014-01-08</text:p>
          </table:table-cell>
          <table:table-cell office:value-type="float" office:value="0.772727272727273" calcext:value-type="float">
            <text:p>0.772727272727273</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54" calcext:value-type="float">
            <text:p>254</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296" calcext:value-type="float">
            <text:p>296</text:p>
          </table:table-cell>
          <table:table-cell office:value-type="string" calcext:value-type="string">
            <text:p>Nick Raynsford</text:p>
          </table:table-cell>
          <table:table-cell office:value-type="float" office:value="51" calcext:value-type="float">
            <text:p>51</text:p>
          </table:table-cell>
          <table:table-cell table:formula="of:=TRUE()" office:value-type="boolean" office:boolean-value="true" calcext:value-type="boolean">
            <text:p>TRUE</text:p>
          </table:table-cell>
          <table:table-cell office:value-type="string" calcext:value-type="string">
            <text:p>Council tax reduction schemes</text:p>
            <text:p>amendment 79, page 4, line 35, at end insert— ‘(1) Each local authority in preparing its council tax reduction scheme should start on the basis that, all other factors being the same, the total cost should be no greater or less than in the previous financial year.’.</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office:value-type="float" office:value="-0.704343690542759" calcext:value-type="float">
            <text:p>-0.704343690542759</text:p>
          </table:table-cell>
          <table:table-cell office:value-type="string" calcext:value-type="string">
            <text:p>2012-01-31</text:p>
          </table:table-cell>
          <table:table-cell office:value-type="float" office:value="0.681818181818182" calcext:value-type="float">
            <text:p>0.681818181818182</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3">
          <table:table-cell office:value-type="float" office:value="292" calcext:value-type="float">
            <text:p>292</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790" calcext:value-type="float">
            <text:p>790</text:p>
          </table:table-cell>
          <table:table-cell office:value-type="string" calcext:value-type="string">
            <text:p>Karen Buck</text:p>
          </table:table-cell>
          <table:table-cell office:value-type="float" office:value="119" calcext:value-type="float">
            <text:p>119</text:p>
          </table:table-cell>
          <table:table-cell table:formula="of:=TRUE()" office:value-type="boolean" office:boolean-value="true" calcext:value-type="boolean">
            <text:p>TRUE</text:p>
          </table:table-cell>
          <table:table-cell office:value-type="string" calcext:value-type="string">
            <text:p>Ending of discretionary payments</text:p>
            <text:p>39, page 52, line 22, leave out subsection (1) and insert— ‘(1) Section 138(1)(b) of the Social Security Contributions and Benefits Act 1992 (discretionary payments out of Social Fund) may be repealed, if the Secretary of State— (a) publishes a detailed proposal for a replacement scheme, or schemes, based on wide consultation with relevant stakeholders; (b) ensures that such a scheme, or schemes, will provide financial protection for applicants in an emergency or crisis, with the eligibility criteria for applicants specified in regulations; (c) demonstrates the feasibility of such a scheme, or schemes, through a pilot or pathfinder process; and (d) demonstrates how an independent appeals mechanism will be implemented.’.</text:p>
            <text:p>That the amendment be mad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84087423133165" calcext:value-type="float">
            <text:p>-1.84087423133165</text:p>
          </table:table-cell>
          <table:table-cell office:value-type="string" calcext:value-type="string">
            <text:p>2011-06-15</text:p>
          </table:table-cell>
          <table:table-cell office:value-type="float" office:value="0.636363636363636" calcext:value-type="float">
            <text:p>0.636363636363636</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47" calcext:value-type="float">
            <text:p>347</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3082" calcext:value-type="float">
            <text:p>3082</text:p>
          </table:table-cell>
          <table:table-cell office:value-type="string" calcext:value-type="string">
            <text:p>Kali Mountford</text:p>
          </table:table-cell>
          <table:table-cell office:value-type="float" office:value="520" calcext:value-type="float">
            <text:p>520</text:p>
          </table:table-cell>
          <table:table-cell table:formula="of:=TRUE()" office:value-type="boolean" office:boolean-value="true" calcext:value-type="boolean">
            <text:p>TRUE</text:p>
          </table:table-cell>
          <table:table-cell office:value-type="string" calcext:value-type="string">
            <text:p>Abolition of corporal punishment in schools etc.</text:p>
            <text:p>.--(1) For section 548 of the Education Act 1996 there shall be substituted-- "No right to give corporal punishment .--(1) Corporal punishment given by, or on the authority of, a member of staff to a child-- (a) for whom education is provided, at any school, or (b) for whom education is provided, otherwise than at school, under any arrangements made by a local education authority, or (c) for whom specified nursery education is provided otherwise than at school, cannot be justified in any proceedings on the ground that it was given in pursuance of a right exercisable by the member of staff by virtue of his position as such. (2) Subsection (1) applies to corporal punishment so given to a child at any time, whether at the school or other place at which education is provided for the child, or elsewhere. (3) The following provisions have effect for the purposes of this section. (4) Any reference to giving corporal punishment to a child is to doing anything for the purpose of punishing that child (whether or not there are other reasons for doing it) which, apart from any justification, would constitute battery. (5) However, corporal punishment shall not be taken to be given to a child by virtue of anything done for reasons that include averting-- (a) an immediate danger of personal injury to, or (b) an immediate danger to the property of, any person (including the child himself). (6) "Member of staff", in relation to the child concerned, means-- (a) any person who works as a teacher at the school or other place at which education is provided for the child, or (b) any other person who (whether in connection with the provision of education for the child or otherwise)-- (i) works at that school or place, or (ii) otherwise provides his services there (whether or not for payment), and has lawful control or charge of the child. (7) "Child" (except in subsection (8)) means a person under the age of 18. (8) "Specified nursery education" means full-time or part-time education suitable for children who have not attained compulsory school age which is provided-- a) by a local education authority; or (b) by any other person-- (i) who is (or is to be) in receipt of financial assistance given by such an authority and whose provision of nursery education is taken into account by the authority in formulating proposals for the purposes of section 110(2)(a) of the School Standards and Framework Act 1998, or (ii) who is (or is to be) in receipt of grants under section 1 of the Nursery Education and Grant-Maintained Schools Act 1996; or (c) (otherwise than as mentioned in paragraph (a) or (b)) in any educational institution which would fall within section 4(1) above (definition of "school") but for the fact that it provides part-time, rather than full-time, primary education." (2) The following provisions of the Education Act 1996, namely-- (a) section 549 (interpretation of section 548), and (b) section 550 (no avoidance of section 548 by refusing admission to school etc.), shall cease to have effect.'.</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1988-03-24</text:p>
          </table:table-cell>
          <table:table-cell office:value-type="float" office:value="-0.409090909090909" calcext:value-type="float">
            <text:p>-0.409090909090909</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334" calcext:value-type="float">
            <text:p>334</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979" calcext:value-type="float">
            <text:p>979</text:p>
          </table:table-cell>
          <table:table-cell office:value-type="string" calcext:value-type="string">
            <text:p>John Healey</text:p>
          </table:table-cell>
          <table:table-cell office:value-type="float" office:value="145" calcext:value-type="float">
            <text:p>145</text:p>
          </table:table-cell>
          <table:table-cell table:formula="of:=TRUE()" office:value-type="boolean" office:boolean-value="true" calcext:value-type="boolean">
            <text:p>TRUE</text:p>
          </table:table-cell>
          <table:table-cell office:value-type="string" calcext:value-type="string">
            <text:p>Housing Benefit and Supported Housing</text:p>
            <text:p>That this House believes that the Government’s planned cuts to housing benefit support for vulnerable people in specialist housing, including the elderly and people who are homeless, disabled or fleeing domestic violence, risk leading to the widespread closure of this accommodation; notes the concern from charities, housing associations, councils and others across the country about the severe effect of these cuts; further notes that supported housing has already suffered as a result of Government spending cuts and policy decisions; notes that the planned changes will apply to all new tenancies from April 2016; notes the clear evidence that the Government’s proposal to mitigate these cuts with discretionary housing payments will not work; and calls on the Government to urgently exempt supported housing from these housing benefit cuts and to consult fully with supported housing providers to safeguard this essential accommodation.</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table:table-cell office:value-type="string" calcext:value-type="string">
            <text:p>2016-01-27</text:p>
          </table:table-cell>
          <table:table-cell office:value-type="float" office:value="0.863636363636364" calcext:value-type="float">
            <text:p>0.863636363636364</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77" calcext:value-type="float">
            <text:p>177</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1877" calcext:value-type="float">
            <text:p>1877</text:p>
          </table:table-cell>
          <table:table-cell office:value-type="string" calcext:value-type="string">
            <text:p>Angus Robertson</text:p>
          </table:table-cell>
          <table:table-cell office:value-type="float" office:value="318" calcext:value-type="float">
            <text:p>318</text:p>
          </table:table-cell>
          <table:table-cell table:formula="of:=TRUE()" office:value-type="boolean" office:boolean-value="true" calcext:value-type="boolean">
            <text:p>TRUE</text:p>
          </table:table-cell>
          <table:table-cell office:value-type="string" calcext:value-type="string">
            <text:p>Scotland Bill – Consent of the Scottish Parliament to certain Westminster Acts</text:p>
            <text:p>‘(1) In section 28 of the Scotland Act 1998 (Acts of the Scottish Parliament), at the end add— “(8) But the Parliament of the United Kingdom must not pass Acts applying to Scotland that make provision about a devolved matter without the consent of the Scottish Parliament. “(9) A provision is about a devolved matter if the provision— (a) applies to Scotland and does not relate to reserved matters, (b) modifies the legislative competence of the Scottish Parliament, or (c) modifies the functions of any member of the Scottish Government. (1) In subsection (8), “Acts” includes any Act, whether a public general Act, a local and personal Act or a private Act. (2) After section 28 of the Scotland Act 1998 insert— “28A Duty to consult the Scottish Government on Bills applying to Scotland(1) A Minister of the Crown shall consult Scottish Ministers before introducing any Bill into the Parliament of the United Kingdom for an Act of that Parliament that would make provision applying to Scotland. (2) Where the Bill is for an Act making provision that would require the consent of the Scottish Parliament by virtue of section 28(8), the requirement to consult under subsection (1) includes a requirement that a Minister of the Crown give the Scottish Ministers a copy of the provisions of the Bill that apply to Scotland no later than— (a) 21 days before the proposed date of introduction, or (b) such later date as the Scottish Ministers may agree. (3) The requirement in subsection (2) does not apply if— (c) the Scottish Ministers so agree, or (d) there are exceptional circumstances justifying failure to comply with the requirement. (4) The reference in subsection (1) to an Act of Parliament is a reference to any Act whether a public general Act, a local and personal Act or a private Act.’</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511215676431185" calcext:value-type="float">
            <text:p>-0.511215676431185</text:p>
          </table:table-cell>
          <table:table-cell office:value-type="string" calcext:value-type="string">
            <text:p>2015-06-15</text:p>
          </table:table-cell>
          <table:table-cell office:value-type="float" office:value="0.818181818181818" calcext:value-type="float">
            <text:p>0.818181818181818</text:p>
          </table:table-cell>
          <table:table-cell office:value-type="string" calcext:value-type="string">
            <text:p>Important</text:p>
          </table:table-cell>
          <table:table-cell office:value-type="string" calcext:value-type="string">
            <text:p>SNP</text:p>
          </table:table-cell>
          <table:table-cell table:style-name="Default" table:number-columns-repeated="16368"/>
        </table:table-row>
        <table:table-row table:style-name="ro3">
          <table:table-cell office:value-type="float" office:value="477" calcext:value-type="float">
            <text:p>477</text:p>
          </table:table-cell>
          <table:table-cell office:value-type="string" calcext:value-type="string">
            <text:p>Terrorism laws - For</text:p>
          </table:table-cell>
          <table:table-cell office:value-type="float" office:value="1053" calcext:value-type="float">
            <text:p>1053</text:p>
          </table:table-cell>
          <table:table-cell office:value-type="float" office:value="423" calcext:value-type="float">
            <text:p>423</text:p>
          </table:table-cell>
          <table:table-cell office:value-type="string" calcext:value-type="string">
            <text:p>Tony McNulty</text:p>
          </table:table-cell>
          <table:table-cell office:value-type="float" office:value="67" calcext:value-type="float">
            <text:p>67</text:p>
          </table:table-cell>
          <table:table-cell table:formula="of:=TRUE()" office:value-type="boolean" office:boolean-value="true" calcext:value-type="boolean">
            <text:p>TRUE</text:p>
          </table:table-cell>
          <table:table-cell office:value-type="string" calcext:value-type="string">
            <text:p>Prevention and Suppression of Terrorism</text:p>
            <text:p>[Relevant documents: The Tenth Report from the Joint Committee on Human Rights of Session 2007-08, Counter-Terrorism Policy and Human Rights (Ninth Repor t) : Annual Renewal of Control Orders Legislation 2008, HC 356.]</text:p>
            <text:p>That the draft Prevention of Terrorism Act 2005 (Continuance in force of sections 1 to 9) Order 2008, which was laid before this House on 30th January, be approved.</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2318690478378" calcext:value-type="float">
            <text:p>-1.52318690478378</text:p>
          </table:table-cell>
          <table:table-cell office:value-type="string" calcext:value-type="string">
            <text:p>2008-02-21</text:p>
          </table:table-cell>
          <table:table-cell office:value-type="float" office:value="0.5" calcext:value-type="float">
            <text:p>0.5</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67" calcext:value-type="float">
            <text:p>267</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50" calcext:value-type="float">
            <text:p>150</text:p>
          </table:table-cell>
          <table:table-cell office:value-type="string" calcext:value-type="string">
            <text:p>Andy Sawford</text:p>
          </table:table-cell>
          <table:table-cell office:value-type="float" office:value="23" calcext:value-type="float">
            <text:p>23</text:p>
          </table:table-cell>
          <table:table-cell table:formula="of:=TRUE()" office:value-type="boolean" office:boolean-value="true" calcext:value-type="boolean">
            <text:p>TRUE</text:p>
          </table:table-cell>
          <table:table-cell office:value-type="string" calcext:value-type="string">
            <text:p>Deregulation Bill (Programme) (No.3) – Health and safety at work: general duty of self-employed persons</text:p>
            <text:p>That this House agrees with Lords amendment 1.</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10330188201652" calcext:value-type="float">
            <text:p>1.10330188201652</text:p>
          </table:table-cell>
          <table:table-cell office:value-type="string" calcext:value-type="string">
            <text:p>2015-03-10</text:p>
          </table:table-cell>
          <table:table-cell office:value-type="float" office:value="0.818181818181818" calcext:value-type="float">
            <text:p>0.818181818181818</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3">
          <table:table-cell office:value-type="float" office:value="398" calcext:value-type="float">
            <text:p>398</text:p>
          </table:table-cell>
          <table:table-cell office:value-type="string" calcext:value-type="string">
            <text:p>Stop climate change</text:p>
          </table:table-cell>
          <table:table-cell office:value-type="float" office:value="1030" calcext:value-type="float">
            <text:p>1030</text:p>
          </table:table-cell>
          <table:table-cell office:value-type="float" office:value="1312" calcext:value-type="float">
            <text:p>1312</text:p>
          </table:table-cell>
          <table:table-cell office:value-type="string" calcext:value-type="string">
            <text:p>Simon Hughes </text:p>
          </table:table-cell>
          <table:table-cell office:value-type="float" office:value="219" calcext:value-type="float">
            <text:p>219</text:p>
          </table:table-cell>
          <table:table-cell table:formula="of:=TRUE()" office:value-type="boolean" office:boolean-value="true" calcext:value-type="boolean">
            <text:p>TRUE</text:p>
          </table:table-cell>
          <table:table-cell office:value-type="string" calcext:value-type="string">
            <text:p>Climate Change (Political Response)</text:p>
            <text:p>This House believes that it is vital that the UK demonstrates political leadership at all levels in response to the climate crisis, and that this is particularly important ahead of the United Nations Climate Change summit in Copenhagen if there is to be an international agreement which will avert the worst effects of catastrophic climate change; further believes that immediate practical responses to the crisis should include a massive expansion of renewable energy and energy efficiency and a commitment for all homes in Britain to be warm homes within 10 years; acknowledges that action taken now to tackle the climate crisis will cost less than action taken in the future; notes the declared support of Labour and Conservative frontbenchers to the objective of the 10:10 campaign which calls for 10% greenhouse gas emission reductions by the end of 2010; agrees that the House will sign up to the 10:10 campaign; calls on Her Majesty's Government and all public sector bodies now to make it their policy to achieve a 10% reduction in greenhouse gas emissions by the end of 2010; and further calls on the Government to bring a delivery plan before this House by the end of 2009 on how these objectives will be achieved.</text:p>
            <text:p>That the original words stand part of the Question.</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289168643907818" calcext:value-type="float">
            <text:p>0.289168643907818</text:p>
          </table:table-cell>
          <table:table-cell office:value-type="string" calcext:value-type="string">
            <text:p>2009-10-21</text:p>
          </table:table-cell>
          <table:table-cell office:value-type="float" office:value="0.545454545454545" calcext:value-type="float">
            <text:p>0.545454545454545</text:p>
          </table:table-cell>
          <table:table-cell office:value-type="string" calcext:value-type="string">
            <text:p>Important</text:p>
          </table:table-cell>
          <table:table-cell office:value-type="string" calcext:value-type="string">
            <text:p>LD</text:p>
          </table:table-cell>
          <table:table-cell table:style-name="Default" table:number-columns-repeated="16368"/>
        </table:table-row>
        <table:table-row table:style-name="ro2">
          <table:table-cell office:value-type="float" office:value="325" calcext:value-type="float">
            <text:p>325</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156" calcext:value-type="float">
            <text:p>156</text:p>
          </table:table-cell>
          <table:table-cell office:value-type="string" calcext:value-type="string">
            <text:p>George Osborne</text:p>
          </table:table-cell>
          <table:table-cell office:value-type="float" office:value="24" calcext:value-type="float">
            <text:p>24</text:p>
          </table:table-cell>
          <table:table-cell table:formula="of:=TRUE()" office:value-type="boolean" office:boolean-value="true" calcext:value-type="boolean">
            <text:p>TRUE</text:p>
          </table:table-cell>
          <table:table-cell office:value-type="string" calcext:value-type="string">
            <text:p>Charter for Budget Responsibility</text:p>
            <text:p>That the Charter for Budget Responsibility: autumn 2015 update which was laid before the House on 12 October, be approved.</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0.97255444962673" calcext:value-type="float">
            <text:p>0.97255444962673</text:p>
          </table:table-cell>
          <table:table-cell office:value-type="string" calcext:value-type="string">
            <text:p>2015-10-14</text:p>
          </table:table-cell>
          <table:table-cell office:value-type="float" office:value="0.818181818181818" calcext:value-type="float">
            <text:p>0.818181818181818</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3">
          <table:table-cell office:value-type="float" office:value="260" calcext:value-type="float">
            <text:p>260</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298" calcext:value-type="float">
            <text:p>1298</text:p>
          </table:table-cell>
          <table:table-cell office:value-type="string" calcext:value-type="string">
            <text:p>Roberta Blackman-Woods</text:p>
          </table:table-cell>
          <table:table-cell office:value-type="float" office:value="213" calcext:value-type="float">
            <text:p>213</text:p>
          </table:table-cell>
          <table:table-cell table:formula="of:=TRUE()" office:value-type="boolean" office:boolean-value="true" calcext:value-type="boolean">
            <text:p>TRUE</text:p>
          </table:table-cell>
          <table:table-cell office:value-type="string" calcext:value-type="string">
            <text:p>High Streets</text:p>
            <text:p>[Relevant documents:Uncorrected transcripts of oral evidence taken before the Communities and Local GovernmentCommittee on 17 June 2013, HC 309-i, and 2 September 2013, HC 612-i.]</text:p>
            <text:p>That this House recognises that high streets and town and city centres are vital to local economies; acknowledges that many small businesses and retailers are struggling under the pressure of business rates rises; notes that since 2010 shop vacancy rates have remained at over 14 per cent but that there has been a 20 per cent increase in numbers of payday loan shops and a three per cent increase in numbers of betting shops in the last year; is concerned that recent changes to permitted development rights and use classes are likely to lead to an over-concentration of betting shops and payday loan companies in many areas, against the wishes of local people and businesses; and calls on the Government to give local communities a greater say over the shape of their own high streets and town and city centres, including control over use classes, to help encourage the more widespread use of neighbourhood planning and greater cooperation between local communities and businesses and to cut and then freeze business rates from 2015 to help small businesses on UK high streets and town and city centres.</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FALSE()" office:value-type="boolean" office:boolean-value="false" calcext:value-type="boolean">
            <text:p>FALSE</text:p>
          </table:table-cell>
          <table:table-cell office:value-type="float" office:value="-2.08192940788372" calcext:value-type="float">
            <text:p>-2.08192940788372</text:p>
          </table:table-cell>
          <table:table-cell office:value-type="string" calcext:value-type="string">
            <text:p>2013-10-16</text:p>
          </table:table-cell>
          <table:table-cell office:value-type="float" office:value="0.727272727272727" calcext:value-type="float">
            <text:p>0.727272727272727</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73" calcext:value-type="float">
            <text:p>173</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1717" calcext:value-type="float">
            <text:p>1717</text:p>
          </table:table-cell>
          <table:table-cell office:value-type="string" calcext:value-type="string">
            <text:p>Joanna Cherry</text:p>
          </table:table-cell>
          <table:table-cell office:value-type="float" office:value="272" calcext:value-type="float">
            <text:p>272</text:p>
          </table:table-cell>
          <table:table-cell table:formula="of:=TRUE()" office:value-type="boolean" office:boolean-value="true" calcext:value-type="boolean">
            <text:p>TRUE</text:p>
          </table:table-cell>
          <table:table-cell office:value-type="string" calcext:value-type="string">
            <text:p>Scotland Bill – Scope to modify the Scotland Act 1998</text:p>
            <text:p>108, page 13, line 32, before “section” insert “section 112(1) and (3) to (5),”. This amendment would allow the Scottish Parliament to modify subsections (1) and (3) to (5) of section 112 of the Scotland Act 1998 to the extent that those subsections apply to any power exercisable within devolved competence to make subordinate legislation. Amendment 109, page 13, line 34, leave out from “power” to end of line 36 and insert “exercisable within devolved competence to make subordinate legislation),”. This amendment would allow the Scottish Parliament to modify the sections of the Scotland Act 1998 to be listed at sub-paragraph 4(2)(e)(i) of Schedule 4 so far as those sections apply to any powers exercisable within devolved competence to make subordinate legislation (including Orders in Council). Amendment 110, page 13, line 37, at end insert “, and (iii) section 124 (so far as that section applies to any power exercisable within devolved competence to make subordinate legislation),”—(Stephen Barclay.) This amendment would allow the Scottish Parliament to modify section 124 of the Scotland Act 1998 to the extent that the section applies to any power exercisable within devolved competence to make subordinate legislation. Amendment proposed: 89, page 13, line 42, at end insert— ‘(2A) In paragraph 4 of Schedule 4 (protection of Scotland Act 1998 from modification), insert new sub-paragraph— “(5A) This paragraph does not apply to amendments to Schedule 5, Part II, Head A, Section A1 insofar as they relate to: (a) taxes and excise in Scotland, (b) government borrowing and lending in Scotland, and (c) control over public expenditure in Scotland.”</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471468357135996" calcext:value-type="float">
            <text:p>0.471468357135996</text:p>
          </table:table-cell>
          <table:table-cell office:value-type="string" calcext:value-type="string">
            <text:p>2015-06-15</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3">
          <table:table-cell office:value-type="float" office:value="168" calcext:value-type="float">
            <text:p>168</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241" calcext:value-type="float">
            <text:p>241</text:p>
          </table:table-cell>
          <table:table-cell office:value-type="string" calcext:value-type="string">
            <text:p>Angus MacNeil</text:p>
          </table:table-cell>
          <table:table-cell office:value-type="float" office:value="43" calcext:value-type="float">
            <text:p>43</text:p>
          </table:table-cell>
          <table:table-cell table:formula="of:=TRUE()" office:value-type="boolean" office:boolean-value="true" calcext:value-type="boolean">
            <text:p>TRUE</text:p>
          </table:table-cell>
          <table:table-cell office:value-type="string" calcext:value-type="string">
            <text:p>Financial Services (Regulation of Derivatives) – Time</text:p>
            <text:p>‘In Schedule 5, section L, subsection L5 of the 1998 Act the words “, time zones and the subject matter of the Summer Time Act 1972.” are deleted.’.</text:p>
            <text:p>That the clause be read a Second tim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11-03-15</text:p>
          </table:table-cell>
          <table:table-cell office:value-type="float" office:value="0.636363636363636" calcext:value-type="float">
            <text:p>0.636363636363636</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416" calcext:value-type="float">
            <text:p>416</text:p>
          </table:table-cell>
          <table:table-cell office:value-type="string" calcext:value-type="string">
            <text:p>Stop climate change</text:p>
          </table:table-cell>
          <table:table-cell office:value-type="float" office:value="1030" calcext:value-type="float">
            <text:p>1030</text:p>
          </table:table-cell>
          <table:table-cell office:value-type="float" office:value="108" calcext:value-type="float">
            <text:p>108</text:p>
          </table:table-cell>
          <table:table-cell office:value-type="string" calcext:value-type="string">
            <text:p>Brandon Lewis</text:p>
          </table:table-cell>
          <table:table-cell office:value-type="float" office:value="17" calcext:value-type="float">
            <text:p>17</text:p>
          </table:table-cell>
          <table:table-cell table:formula="of:=TRUE()" office:value-type="boolean" office:boolean-value="true" calcext:value-type="boolean">
            <text:p>TRUE</text:p>
          </table:table-cell>
          <table:table-cell office:value-type="string" calcext:value-type="string">
            <text:p>Housing and Planning Bill – Neighbourhood right of appeal</text:p>
            <text:p>That this House disagrees with Lords amendment 97.</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612788690484386" calcext:value-type="float">
            <text:p>-0.612788690484386</text:p>
          </table:table-cell>
          <table:table-cell office:value-type="string" calcext:value-type="string">
            <text:p>2016-05-03</text:p>
          </table:table-cell>
          <table:table-cell office:value-type="float" office:value="0.863636363636364" calcext:value-type="float">
            <text:p>0.863636363636364</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372" calcext:value-type="float">
            <text:p>372</text:p>
          </table:table-cell>
          <table:table-cell office:value-type="string" calcext:value-type="string">
            <text:p>Schools - Greater Autonomy</text:p>
          </table:table-cell>
          <table:table-cell office:value-type="float" office:value="1074" calcext:value-type="float">
            <text:p>1074</text:p>
          </table:table-cell>
          <table:table-cell office:value-type="float" office:value="98" calcext:value-type="float">
            <text:p>98</text:p>
          </table:table-cell>
          <table:table-cell/>
          <table:table-cell office:value-type="float" office:value="15" calcext:value-type="float">
            <text:p>15</text:p>
          </table:table-cell>
          <table:table-cell table:formula="of:=TRUE()" office:value-type="boolean" office:boolean-value="true" calcext:value-type="boolean">
            <text:p>TRUE</text:p>
          </table:table-cell>
          <table:table-cell office:value-type="string" calcext:value-type="string">
            <text:p>Local Referendums Bill – Pre-commencement applications etc</text:p>
            <text:p>That the clause stand part of the Bill.</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10-07-26</text:p>
          </table:table-cell>
          <table:table-cell office:value-type="float" office:value="0.590909090909091" calcext:value-type="float">
            <text:p>0.590909090909091</text:p>
          </table:table-cell>
          <table:table-cell office:value-type="string" calcext:value-type="string">
            <text:p>You mea</text:p>
          </table:table-cell>
          <table:table-cell/>
          <table:table-cell table:style-name="Default" table:number-columns-repeated="16368"/>
        </table:table-row>
        <table:table-row table:style-name="ro2">
          <table:table-cell office:value-type="float" office:value="256" calcext:value-type="float">
            <text:p>256</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96" calcext:value-type="float">
            <text:p>96</text:p>
          </table:table-cell>
          <table:table-cell office:value-type="string" calcext:value-type="string">
            <text:p>Bob Neill</text:p>
          </table:table-cell>
          <table:table-cell office:value-type="float" office:value="18" calcext:value-type="float">
            <text:p>18</text:p>
          </table:table-cell>
          <table:table-cell table:formula="of:=TRUE()" office:value-type="boolean" office:boolean-value="true" calcext:value-type="boolean">
            <text:p>TRUE</text:p>
          </table:table-cell>
          <table:table-cell office:value-type="string" calcext:value-type="string">
            <text:p>Local Government Finance Bill – Extent and short title</text:p>
            <text:p>That the Bill be now read the Third tim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566291735239" calcext:value-type="float">
            <text:p>-1.5566291735239</text:p>
          </table:table-cell>
          <table:table-cell office:value-type="string" calcext:value-type="string">
            <text:p>2012-05-21</text:p>
          </table:table-cell>
          <table:table-cell office:value-type="float" office:value="0.681818181818182" calcext:value-type="float">
            <text:p>0.681818181818182</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54" calcext:value-type="float">
            <text:p>454</text:p>
          </table:table-cell>
          <table:table-cell office:value-type="string" calcext:value-type="string">
            <text:p>Terrorism laws - For</text:p>
          </table:table-cell>
          <table:table-cell office:value-type="float" office:value="1053" calcext:value-type="float">
            <text:p>1053</text:p>
          </table:table-cell>
          <table:table-cell office:value-type="float" office:value="209" calcext:value-type="float">
            <text:p>209</text:p>
          </table:table-cell>
          <table:table-cell office:value-type="string" calcext:value-type="string">
            <text:p>Hazel Blears</text:p>
          </table:table-cell>
          <table:table-cell office:value-type="float" office:value="38" calcext:value-type="float">
            <text:p>38</text:p>
          </table:table-cell>
          <table:table-cell table:formula="of:=TRUE()" office:value-type="boolean" office:boolean-value="true" calcext:value-type="boolean">
            <text:p>TRUE</text:p>
          </table:table-cell>
          <table:table-cell office:value-type="string" calcext:value-type="string">
            <text:p>Prevention of Terrorism Bill</text:p>
            <text:p>That this House insists on its disagreement with the Lords in their amendments Nos. 27, 31 and 32 and on its amendments Nos. 27C and 27D in lieu and proposes amendment (a) in lieu.</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05-03-10</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95" calcext:value-type="float">
            <text:p>195</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816" calcext:value-type="float">
            <text:p>816</text:p>
          </table:table-cell>
          <table:table-cell office:value-type="string" calcext:value-type="string">
            <text:p>Jenny Chapman</text:p>
          </table:table-cell>
          <table:table-cell office:value-type="float" office:value="125" calcext:value-type="float">
            <text:p>125</text:p>
          </table:table-cell>
          <table:table-cell table:formula="of:=TRUE()" office:value-type="boolean" office:boolean-value="true" calcext:value-type="boolean">
            <text:p>TRUE</text:p>
          </table:table-cell>
          <table:table-cell office:value-type="string" calcext:value-type="string">
            <text:p>European Union (Withdrawal) Bill – Creation of UK-wide frameworks</text:p>
            <text:p>“(1) The Secretary of State must lay before each House of Parliament proposals for replacing European frameworks with UK ones. (2) UK-wide frameworks shall be proposed if and only if they are necessary to— (a) enable the functioning of the UK internal market; (b) ensure compliance with international obligations; (a) ensure the UK can negotiate, enter into and implement new trade agreements and international treaties; (b) enable the management of common resources; (c) administer and provide access to justice in cases with a cross-border element; (d) safeguard the security of the UK. (3) Ministers of the Crown shall only create UK-wide frameworks if they have consulted with, and secured the agreement of, the affected devolved administrations.</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50314295311811" calcext:value-type="float">
            <text:p>-1.50314295311811</text:p>
          </table:table-cell>
          <table:table-cell office:value-type="string" calcext:value-type="string">
            <text:p>2017-12-04</text:p>
          </table:table-cell>
          <table:table-cell office:value-type="float" office:value="0.909090909090909" calcext:value-type="float">
            <text:p>0.909090909090909</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74" calcext:value-type="float">
            <text:p>174</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888" calcext:value-type="float">
            <text:p>888</text:p>
          </table:table-cell>
          <table:table-cell office:value-type="string" calcext:value-type="string">
            <text:p>Joanna Cherry</text:p>
          </table:table-cell>
          <table:table-cell office:value-type="float" office:value="141" calcext:value-type="float">
            <text:p>141</text:p>
          </table:table-cell>
          <table:table-cell table:formula="of:=TRUE()" office:value-type="boolean" office:boolean-value="true" calcext:value-type="boolean">
            <text:p>TRUE</text:p>
          </table:table-cell>
          <table:table-cell office:value-type="string" calcext:value-type="string">
            <text:p>Scotland Bill – UK Pensions liability</text:p>
            <text:p>110, page 13, line 37, at end insert “, and (iii) section 124 (so far as that section applies to any power exercisable within devolved competence to make subordinate legislation),”—(Stephen Barclay.) This amendment would allow the Scottish Parliament to modify section 124 of the Scotland Act 1998 to the extent that the section applies to any power exercisable within devolved competence to make subordinate legislation. Amendment proposed: 89, page 13, line 42, at end insert— ‘(2A) In paragraph 4 of Schedule 4 (protection of Scotland Act 1998 from modification), insert new sub-paragraph— “(5A) This paragraph does not apply to amendments to Schedule 5, Part II, Head A, Section A1 insofar as they relate to: (a) taxes and excise in Scotland, (b) government borrowing and lending in Scotland, and (c) control over public expenditure in Scotland.”</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88202449647503" calcext:value-type="float">
            <text:p>1.88202449647503</text:p>
          </table:table-cell>
          <table:table-cell office:value-type="string" calcext:value-type="string">
            <text:p>2015-06-15</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SNP</text:p>
          </table:table-cell>
          <table:table-cell table:style-name="Default" table:number-columns-repeated="16368"/>
        </table:table-row>
        <table:table-row table:style-name="ro2">
          <table:table-cell office:value-type="float" office:value="441" calcext:value-type="float">
            <text:p>441</text:p>
          </table:table-cell>
          <table:table-cell office:value-type="string" calcext:value-type="string">
            <text:p>Terrorism laws - For</text:p>
          </table:table-cell>
          <table:table-cell office:value-type="float" office:value="1053" calcext:value-type="float">
            <text:p>1053</text:p>
          </table:table-cell>
          <table:table-cell office:value-type="float" office:value="215" calcext:value-type="float">
            <text:p>215</text:p>
          </table:table-cell>
          <table:table-cell/>
          <table:table-cell office:value-type="float" office:value="35" calcext:value-type="float">
            <text:p>35</text:p>
          </table:table-cell>
          <table:table-cell table:formula="of:=TRUE()" office:value-type="boolean" office:boolean-value="true" calcext:value-type="boolean">
            <text:p>TRUE</text:p>
          </table:table-cell>
          <table:table-cell office:value-type="string" calcext:value-type="string">
            <text:p>Prevention and Suppression of Terrorism</text:p>
            <text:p>That the draft Anti-terrorism, Crime and Security Act 2001 (Continuance in force of sections 21 to 23) Order 2004, which was laid before this House on 20 January, be approved.</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10870358058291" calcext:value-type="float">
            <text:p>1.10870358058291</text:p>
          </table:table-cell>
          <table:table-cell office:value-type="string" calcext:value-type="string">
            <text:p>2004-03-03</text:p>
          </table:table-cell>
          <table:table-cell office:value-type="float" office:value="0.318181818181818" calcext:value-type="float">
            <text:p>0.318181818181818</text:p>
          </table:table-cell>
          <table:table-cell office:value-type="string" calcext:value-type="string">
            <text:p>Not important</text:p>
          </table:table-cell>
          <table:table-cell/>
          <table:table-cell table:style-name="Default" table:number-columns-repeated="16368"/>
        </table:table-row>
        <table:table-row table:style-name="ro2">
          <table:table-cell office:value-type="float" office:value="332" calcext:value-type="float">
            <text:p>332</text:p>
          </table:table-cell>
          <table:table-cell office:value-type="string" calcext:value-type="string">
            <text:p>Reduce Spending on Welfare Benefits</text:p>
          </table:table-cell>
          <table:table-cell office:value-type="float" office:value="6670" calcext:value-type="float">
            <text:p>6670</text:p>
          </table:table-cell>
          <table:table-cell office:value-type="float" office:value="1663" calcext:value-type="float">
            <text:p>1663</text:p>
          </table:table-cell>
          <table:table-cell office:value-type="string" calcext:value-type="string">
            <text:p>John Martin McDonnell</text:p>
          </table:table-cell>
          <table:table-cell office:value-type="float" office:value="280" calcext:value-type="float">
            <text:p>280</text:p>
          </table:table-cell>
          <table:table-cell table:formula="of:=TRUE()" office:value-type="boolean" office:boolean-value="true" calcext:value-type="boolean">
            <text:p>TRUE</text:p>
          </table:table-cell>
          <table:table-cell office:value-type="string" calcext:value-type="string">
            <text:p>The Economy</text:p>
            <text:p>That this House believes that the Government has failed to deliver on its commitment to stand up for working people; notes that the Government’s existing plans to cut tax credits will cost more than three million working families an average of £1,300 a year from next April; further notes that 4.1 million children now live in absolute poverty, an increase of 500,000 since 2009-10; notes that in 2014 the UK’s current account deficit reached the highest level ever recorded, at 5.1 per cent; notes that 85 per cent of the money saved from tax and benefit changes in the last Parliament came from women; further believes that the Government has failed to deliver the more sustainable economy the country needs; notes that, rather than investing in building new homes to cut housing benefit costs, housing investment has been slashed and housing benefit has risen by over £2 billion a year in real terms; notes that the gap between UK productivity per hour worked and the rest of the G7 grew to 20 percentage points in 2014, the widest productivity gap since 1991; believes that further deep cuts to the budget of the Department for Business, Innovation and Skills could damage the Government’s ability to boost innovation and productivity and could restrict opportunities for British businesses and workers to succeed in the global economy; calls on the Government to reverse fully and fairly its plans to cut tax credits from next April; and further calls for the Government to invest in growing a more productive economy with a focus on science, technology and green jobs to equip Britain for the future and share more fairly the proceeds of growth.</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table-cell office:value-type="string" calcext:value-type="string">
            <text:p>2015-11-18</text:p>
          </table:table-cell>
          <table:table-cell office:value-type="float" office:value="0.818181818181818" calcext:value-type="float">
            <text:p>0.818181818181818</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455" calcext:value-type="float">
            <text:p>455</text:p>
          </table:table-cell>
          <table:table-cell office:value-type="string" calcext:value-type="string">
            <text:p>Terrorism laws - For</text:p>
          </table:table-cell>
          <table:table-cell office:value-type="float" office:value="1053" calcext:value-type="float">
            <text:p>1053</text:p>
          </table:table-cell>
          <table:table-cell office:value-type="float" office:value="225" calcext:value-type="float">
            <text:p>225</text:p>
          </table:table-cell>
          <table:table-cell office:value-type="string" calcext:value-type="string">
            <text:p>Hazel Blears</text:p>
          </table:table-cell>
          <table:table-cell office:value-type="float" office:value="40" calcext:value-type="float">
            <text:p>40</text:p>
          </table:table-cell>
          <table:table-cell table:formula="of:=TRUE()" office:value-type="boolean" office:boolean-value="true" calcext:value-type="boolean">
            <text:p>TRUE</text:p>
          </table:table-cell>
          <table:table-cell office:value-type="string" calcext:value-type="string">
            <text:p>Prevention of Terrorism Bill</text:p>
            <text:p>That this House disagrees with Lords amendment No. 33D and insists on its amendment No. 33C in lieu, does not insist on its amendments Nos. 33A and 33B and proposes amendments (a) and (b) in lieu.</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1.2784518626073" calcext:value-type="float">
            <text:p>1.2784518626073</text:p>
          </table:table-cell>
          <table:table-cell office:value-type="string" calcext:value-type="string">
            <text:p>2005-03-10</text:p>
          </table:table-cell>
          <table:table-cell office:value-type="float" office:value="0.363636363636364" calcext:value-type="float">
            <text:p>0.363636363636364</text:p>
          </table:table-cell>
          <table:table-cell office:value-type="string" calcext:value-type="string">
            <text:p>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255" calcext:value-type="float">
            <text:p>255</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78" calcext:value-type="float">
            <text:p>78</text:p>
          </table:table-cell>
          <table:table-cell office:value-type="string" calcext:value-type="string">
            <text:p>Jacob Rees-Mogg</text:p>
          </table:table-cell>
          <table:table-cell office:value-type="float" office:value="13" calcext:value-type="float">
            <text:p>13</text:p>
          </table:table-cell>
          <table:table-cell table:formula="of:=TRUE()" office:value-type="boolean" office:boolean-value="true" calcext:value-type="boolean">
            <text:p>TRUE</text:p>
          </table:table-cell>
          <table:table-cell office:value-type="string" calcext:value-type="string">
            <text:p>Street trading: vehicles and the internet</text:p>
            <text:p>amendment 22, to leave out clause 9.</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table:formula="of:=FALSE()" office:value-type="boolean" office:boolean-value="false" calcext:value-type="boolean">
            <text:p>FALSE</text:p>
          </table:table-cell>
          <table:table-cell office:value-type="float" office:value="-1.40846129636356" calcext:value-type="float">
            <text:p>-1.40846129636356</text:p>
          </table:table-cell>
          <table:table-cell office:value-type="string" calcext:value-type="string">
            <text:p>2012-02-21</text:p>
          </table:table-cell>
          <table:table-cell office:value-type="float" office:value="0.681818181818182" calcext:value-type="float">
            <text:p>0.681818181818182</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row table:style-name="ro2">
          <table:table-cell office:value-type="float" office:value="474" calcext:value-type="float">
            <text:p>474</text:p>
          </table:table-cell>
          <table:table-cell office:value-type="string" calcext:value-type="string">
            <text:p>Terrorism laws - For</text:p>
          </table:table-cell>
          <table:table-cell office:value-type="float" office:value="1053" calcext:value-type="float">
            <text:p>1053</text:p>
          </table:table-cell>
          <table:table-cell office:value-type="float" office:value="294" calcext:value-type="float">
            <text:p>294</text:p>
          </table:table-cell>
          <table:table-cell office:value-type="string" calcext:value-type="string">
            <text:p>Dominic Grieve</text:p>
          </table:table-cell>
          <table:table-cell office:value-type="float" office:value="50" calcext:value-type="float">
            <text:p>50</text:p>
          </table:table-cell>
          <table:table-cell table:formula="of:=TRUE()" office:value-type="boolean" office:boolean-value="true" calcext:value-type="boolean">
            <text:p>TRUE</text:p>
          </table:table-cell>
          <table:table-cell office:value-type="string" calcext:value-type="string">
            <text:p>Terrorism Bill</text:p>
            <text:p>(b), in page 2, line 1, leave out subsection (4) and insert—  '(   )   for the purposes of this section, "indirect encouragement" comprises the making of a statement referring to terrorism in such a way that the listener, reader or viewer would infer that he should emulate it.'.</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132969674146876" calcext:value-type="float">
            <text:p>0.132969674146876</text:p>
          </table:table-cell>
          <table:table-cell office:value-type="string" calcext:value-type="string">
            <text:p>2006-03-16</text:p>
          </table:table-cell>
          <table:table-cell office:value-type="float" office:value="0.409090909090909" calcext:value-type="float">
            <text:p>0.409090909090909</text:p>
          </table:table-cell>
          <table:table-cell office:value-type="string" calcext:value-type="string">
            <text:p>Important</text:p>
          </table:table-cell>
          <table:table-cell office:value-type="string" calcext:value-type="string">
            <text:p>Con</text:p>
          </table:table-cell>
          <table:table-cell table:style-name="Default" table:number-columns-repeated="16368"/>
        </table:table-row>
        <table:table-row table:style-name="ro3">
          <table:table-cell office:value-type="float" office:value="257" calcext:value-type="float">
            <text:p>257</text:p>
          </table:table-cell>
          <table:table-cell office:value-type="string" calcext:value-type="string">
            <text:p>More powers for local councils</text:p>
          </table:table-cell>
          <table:table-cell office:value-type="float" office:value="6695" calcext:value-type="float">
            <text:p>6695</text:p>
          </table:table-cell>
          <table:table-cell office:value-type="float" office:value="139" calcext:value-type="float">
            <text:p>139</text:p>
          </table:table-cell>
          <table:table-cell office:value-type="string" calcext:value-type="string">
            <text:p>Roberta Blackman-Woods</text:p>
          </table:table-cell>
          <table:table-cell office:value-type="float" office:value="25" calcext:value-type="float">
            <text:p>25</text:p>
          </table:table-cell>
          <table:table-cell table:formula="of:=TRUE()" office:value-type="boolean" office:boolean-value="true" calcext:value-type="boolean">
            <text:p>TRUE</text:p>
          </table:table-cell>
          <table:table-cell office:value-type="string" calcext:value-type="string">
            <text:p>Growth and Infrastructure Bill (Programme) (No. 2) – Purpose of planning</text:p>
            <text:p>42, page 1, line 2, leave out clause 1.</text:p>
            <text:p>That the amendment be made</text:p>
          </table:table-cell>
          <table:table-cell table:formula="of:=FALSE()" office:value-type="boolean" office:boolean-value="false" calcext:value-type="boolean">
            <text:p>FALS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60600995134564" calcext:value-type="float">
            <text:p>0.60600995134564</text:p>
          </table:table-cell>
          <table:table-cell office:value-type="string" calcext:value-type="string">
            <text:p>2012-12-17</text:p>
          </table:table-cell>
          <table:table-cell office:value-type="float" office:value="0.681818181818182" calcext:value-type="float">
            <text:p>0.681818181818182</text:p>
          </table:table-cell>
          <table:table-cell office:value-type="string" calcext:value-type="string">
            <text:p>Not important</text:p>
          </table:table-cell>
          <table:table-cell office:value-type="string" calcext:value-type="string">
            <text:p>Lab</text:p>
          </table:table-cell>
          <table:table-cell table:style-name="Default" table:number-columns-repeated="16368"/>
        </table:table-row>
        <table:table-row table:style-name="ro2">
          <table:table-cell office:value-type="float" office:value="189" calcext:value-type="float">
            <text:p>189</text:p>
          </table:table-cell>
          <table:table-cell office:value-type="string" calcext:value-type="string">
            <text:p>Further devolution to Scotland</text:p>
          </table:table-cell>
          <table:table-cell office:value-type="float" office:value="6709" calcext:value-type="float">
            <text:p>6709</text:p>
          </table:table-cell>
          <table:table-cell office:value-type="float" office:value="146" calcext:value-type="float">
            <text:p>146</text:p>
          </table:table-cell>
          <table:table-cell office:value-type="string" calcext:value-type="string">
            <text:p>Stephen Barclay</text:p>
          </table:table-cell>
          <table:table-cell office:value-type="float" office:value="23" calcext:value-type="float">
            <text:p>23</text:p>
          </table:table-cell>
          <table:table-cell table:formula="of:=TRUE()" office:value-type="boolean" office:boolean-value="true" calcext:value-type="boolean">
            <text:p>TRUE</text:p>
          </table:table-cell>
          <table:table-cell office:value-type="string" calcext:value-type="string">
            <text:p>Scotland Bill (Programme) (No.2) – Abortion</text:p>
            <text:p>“In Part 2 of Schedule 5 to the Scotland Act 1998 (specific reservations) omit Section J1 (abortion).”</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table:formula="of:=TRUE()" office:value-type="boolean" office:boolean-value="true" calcext:value-type="boolean">
            <text:p>TRUE</text:p>
          </table:table-cell>
          <table:table-cell office:value-type="float" office:value="0.0733179671884038" calcext:value-type="float">
            <text:p>0.0733179671884038</text:p>
          </table:table-cell>
          <table:table-cell office:value-type="string" calcext:value-type="string">
            <text:p>2015-11-09</text:p>
          </table:table-cell>
          <table:table-cell office:value-type="float" office:value="0.818181818181818" calcext:value-type="float">
            <text:p>0.818181818181818</text:p>
          </table:table-cell>
          <table:table-cell office:value-type="string" calcext:value-type="string">
            <text:p>Not important</text:p>
          </table:table-cell>
          <table:table-cell office:value-type="string" calcext:value-type="string">
            <text:p>Con</text:p>
          </table:table-cell>
          <table:table-cell table:style-name="Default" table:number-columns-repeated="1636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FreeSans" svg:font-family="FreeSans" style:font-family-generic="system" style:font-pitch="variable"/>
    <style:font-face style:name="Google Sans Flex" svg:font-family="'Google Sans Flex'"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penpyxl</meta:initial-creator>
    <meta:creation-date>2026-03-30T12:32:43</meta:creation-date>
    <dc:date>2026-03-30T14:06:56.201043145</dc:date>
    <meta:generator>LibreOffice/26.2.1.2$Linux_X86_64 LibreOffice_project/620$Build-2</meta:generator>
    <meta:editing-duration>PT11S</meta:editing-duration>
    <meta:editing-cycles>1</meta:editing-cycles>
    <meta:document-statistic meta:table-count="1" meta:cell-count="1580" meta:object-count="0"/>
    <meta:user-defined meta:name="AppVersion">3.1</meta:user-defined>
  </office:meta>
</office:document-meta>
</file>